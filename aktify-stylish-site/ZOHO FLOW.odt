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3" style:family="paragraph" style:parent-style-name="Horizontal_20_Line">
      <style:paragraph-properties fo:margin-left="0in" fo:margin-right="0in" fo:margin-top="0in" fo:margin-bottom="0in" style:contextual-spacing="false" style:writing-mode="lr-tb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5pt" style:text-underline-style="none" fo:font-weight="bold" style:text-blinking="false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1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 style:writing-mode="lr-tb"/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P1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 style:writing-mode="lr-tb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T1" style:family="text">
      <style:text-properties style:text-line-through-style="none" style:text-line-through-type="none" style:font-name="Google Sans" fo:font-size="12pt" style:text-underline-style="none" fo:font-weight="bold" style:text-blinking="false" loext:padding="0in" loext:border="none"/>
    </style:style>
    <style:style style:name="T2" style:family="text">
      <style:text-properties style:text-line-through-style="none" style:text-line-through-type="none" style:font-name="Google Sans" fo:font-size="12pt" style:text-underline-style="none" fo:font-weight="normal" style:text-blinking="false" loext:padding="0in" loext:border="none"/>
    </style:style>
    <style:style style:name="T3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0f2f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Zoho Flow</text:span></text:span><text:span text:style-name="T2"> — это визуальный конструктор автоматизаций, который работает как «клей» между вашими приложениями. Он постоянно мониторит ваш ящик Zoho Mail, и как только видит письмо по шаблону от </text:span><text:span text:style-name="Strong_20_Emphasis"><text:span text:style-name="T1">Aktify!</text:span></text:span><text:span text:style-name="T2">, сам за секунду вытаскивает из него текст (Имя, Телефон, Номер заказа) и аккуратно раскладывает его по столбцам в Google Таблицу (или Zoho Sheet).</text:span></text:p>
      <text:p text:style-name="P2">Ниже представлена подробная пошаговая инструкция, как настроить этот процесс под ваш пример письма.</text:p>
      <text:p text:style-name="P3"/>
      <text:p text:style-name="P4">Шаг 1. Подготовка таблицы (Google Sheets или Zoho Sheet)</text:p>
      <text:p text:style-name="P5">Создайте новую таблицу на своем компьютере или в приложении на iPhone и назовите столбцы в первой строке:</text:p>
      <text:list text:style-name="L1">
        <text:list-item>
          <text:p text:style-name="P6"><text:span text:style-name="Strong_20_Emphasis"><text:span text:style-name="T1">A:</text:span></text:span><text:span text:style-name="T2"> Дата</text:span></text:p>
        </text:list-item>
        <text:list-item>
          <text:p text:style-name="P6"><text:span text:style-name="Strong_20_Emphasis"><text:span text:style-name="T1">B:</text:span></text:span><text:span text:style-name="T2"> Тип заявки</text:span></text:p>
        </text:list-item>
        <text:list-item>
          <text:p text:style-name="P6"><text:span text:style-name="Strong_20_Emphasis"><text:span text:style-name="T1">C:</text:span></text:span><text:span text:style-name="T2"> Имя клиента</text:span></text:p>
        </text:list-item>
        <text:list-item>
          <text:p text:style-name="P6"><text:span text:style-name="Strong_20_Emphasis"><text:span text:style-name="T1">D:</text:span></text:span><text:span text:style-name="T2"> Контакты (Тел/ТГ)</text:span></text:p>
        </text:list-item>
        <text:list-item>
          <text:p text:style-name="P6"><text:span text:style-name="Strong_20_Emphasis"><text:span text:style-name="T1">E:</text:span></text:span><text:span text:style-name="T2"> Номер заказа</text:span></text:p>
        </text:list-item>
        <text:list-item>
          <text:p text:style-name="P6"><text:span text:style-name="Strong_20_Emphasis"><text:span text:style-name="T1">F:</text:span></text:span><text:span text:style-name="T2"> Сообщение</text:span></text:p>
        </text:list-item>
      </text:list>
      <text:p text:style-name="P3"/>
      <text:p text:style-name="P4">Шаг 2. Создание сценария (Flow) в Zoho Flow</text:p>
      <text:list text:style-name="L2">
        <text:list-item>
          <text:p text:style-name="P7"><text:span text:style-name="T2">Перейдите на сайт и войдите под своей учетной записью Zoho Mail.</text:span><text:span text:style-name="Strong_20_Emphasis"><text:span text:style-name="T1">zoho.com</text:span></text:span></text:p>
        </text:list-item>
        <text:list-item>
          <text:p text:style-name="P7"><text:span text:style-name="T2">Нажмите кнопку (Создать сценарий).</text:span><text:span text:style-name="Strong_20_Emphasis"><text:span text:style-name="T1">Create Flow</text:span></text:span></text:p>
        </text:list-item>
        <text:list-item>
          <text:p text:style-name="P7"><text:span text:style-name="T2">Назовите его, например: .</text:span><text:span text:style-name="Emphasis"><text:span text:style-name="T2">«Парсинг заявок Aktify!»</text:span></text:span></text:p>
        </text:list-item>
      </text:list>
      <text:p text:style-name="P3"/>
      <text:p text:style-name="P4">Шаг 3. Настройка триггера (Что запускает процесс)</text:p>
      <text:list text:style-name="L3">
        <text:list-item>
          <text:p text:style-name="P8"><text:span text:style-name="T2">В левом меню выберите тип триггера: (Приложение).</text:span><text:span text:style-name="Strong_20_Emphasis"><text:span text:style-name="T1">App</text:span></text:span></text:p>
        </text:list-item>
        <text:list-item>
          <text:p text:style-name="P8"><text:span text:style-name="T2">Найдите в списке и выберите событие: (Новое письмо).</text:span><text:span text:style-name="Strong_20_Emphasis"><text:span text:style-name="T1">Zoho MailNew Mail</text:span></text:span></text:p>
        </text:list-item>
        <text:list-item>
          <text:p text:style-name="P8"><text:span text:style-name="T2">Нажмите и выберите ваш почтовый ящик.</text:span><text:span text:style-name="Emphasis"><text:span text:style-name="T2">Next</text:span></text:span></text:p>
        </text:list-item>
        <text:list-item>
          <text:p text:style-name="P8"><text:span text:style-name="Strong_20_Emphasis"><text:span text:style-name="T1">Настройка фильтра (Criteria):</text:span></text:span><text:span text:style-name="T2"> Чтобы сценарий не срабатывал на личные письма или спам, укажите условие:</text:span></text:p>
          <text:list>
            <text:list-item>
              <text:p text:style-name="P8"><text:span text:style-name="Source_20_Text"><text:span text:style-name="T3">Subject</text:span></text:span><text:span text:style-name="T2"> (Тема) ➔ (содержит) ➔ </text:span><text:span text:style-name="Source_20_Text"><text:span text:style-name="T3">containsAktify!</text:span></text:span><text:span text:style-name="T2"> </text:span><text:span text:style-name="Emphasis"><text:span text:style-name="T2">(или другое ключевое слово, которое всегда есть в теме ваших писем от EmailJS)</text:span></text:span><text:span text:style-name="T2">.</text:span></text:p>
            </text:list-item>
          </text:list>
        </text:list-item>
      </text:list>
      <text:p text:style-name="P3"/>
      <text:p text:style-name="P4">Шаг 4. Настройка парсера текста (Вытаскиваем данные)</text:p>
      <text:p text:style-name="P5">Поскольку текст письма всегда приходит строго структурированным, мы используем встроенную функцию Zoho Flow, которая умеет искать слова-маркеры.</text:p>
      <text:list text:style-name="L4">
        <text:list-item>
          <text:p text:style-name="P9"><text:span text:style-name="T2">В левой панели Zoho Flow перейдите в раздел (Логика) или (Утилиты) и перетащите в рабочую зону кубик (или воспользуйтесь функцией / регулярные выражения).</text:span><text:span text:style-name="Strong_20_Emphasis"><text:span text:style-name="T1">LogicUtilitiesString Manipulator</text:span></text:span><text:span text:style-name="Emphasis"><text:span text:style-name="T2">Fetch data using RegEx</text:span></text:span></text:p>
        </text:list-item>
        <text:list-item>
          <text:p text:style-name="P9"><text:span text:style-name="T2">Но гораздо проще использовать стандартный инструмент деления текста. Нам нужно настроить чтение переменной текста письма ().</text:span><text:span text:style-name="Source_20_Text"><text:span text:style-name="T3">Content</text:span></text:span></text:p>
        </text:list-item>
        <text:list-item>
          <text:p text:style-name="P9"><text:span text:style-name="T2">Чтобы вытащить телефон Игоря, мы просим систему: .</text:span><text:span text:style-name="Emphasis"><text:span text:style-name="T2">«Найди в тексте письма маркер и скопируй всё, что идет после него до конца строки»</text:span></text:span><text:span text:style-name="Emphasis"><text:span text:style-name="Source_20_Text"><text:span text:style-name="T3">Контакты (Тел/ТГ): </text:span></text:span></text:span></text:p>
        </text:list-item>
      </text:list>
      <text:list text:style-name="L5">
        <text:list-item>
          <text:p text:style-name="P10"><text:span text:style-name="T2">Чтобы забрать Тип: </text:span><text:span text:style-name="Source_20_Text"><text:span text:style-name="T3">Тип заявки:\s*(.*)</text:span></text:span></text:p>
        </text:list-item>
        <text:list-item>
          <text:p text:style-name="P10"><text:span text:style-name="T2">Чтобы забрать Имя: </text:span><text:span text:style-name="Source_20_Text"><text:span text:style-name="T3">Имя клиента:\s*(.*)</text:span></text:span></text:p>
        </text:list-item>
        <text:list-item>
          <text:p text:style-name="P10"><text:span text:style-name="T2">Чтобы забрать Контакты: </text:span><text:span text:style-name="Source_20_Text"><text:span text:style-name="T3">Контакты \(Тел/ТГ\):\s*(.*)</text:span></text:span></text:p>
        </text:list-item>
        <text:list-item>
          <text:p text:style-name="P10"><text:span text:style-name="T2">Чтобы забрать Номер: </text:span><text:span text:style-name="Source_20_Text"><text:span text:style-name="T3">Номер заказа:\s*(.*)</text:span></text:span></text:p>
        </text:list-item>
      </text:list>
      <text:p text:style-name="P3"/>
      <text:p text:style-name="P4"><text:soft-page-break/>Шаг 5. Настройка действия (Куда отправлять данные)</text:p>
      <text:list text:style-name="L6">
        <text:list-item>
          <text:p text:style-name="P11"><text:span text:style-name="T2">В левом меню приложений найдите (или ).</text:span><text:span text:style-name="Strong_20_Emphasis"><text:span text:style-name="T1">Google Sheets</text:span></text:span><text:span text:style-name="Emphasis"><text:span text:style-name="T2">Zoho Sheet</text:span></text:span></text:p>
        </text:list-item>
        <text:list-item>
          <text:p text:style-name="P11"><text:span text:style-name="T2">Перетащите в рабочую область действие (Создать строку).</text:span><text:span text:style-name="Strong_20_Emphasis"><text:span text:style-name="T1">Create row</text:span></text:span></text:p>
        </text:list-item>
        <text:list-item>
          <text:p text:style-name="P12">Привяжите свой Google-аккаунт (это делается в 2 клика через авторизацию Google) и выберите созданную на Шаге 1 таблицу и лист.</text:p>
        </text:list-item>
        <text:list-item>
          <text:p text:style-name="P11"><text:span text:style-name="T2">Перед вами откроется список ваших колонок ().</text:span><text:span text:style-name="Emphasis"><text:span text:style-name="T2">Тип заявки, Имя, Контакты...</text:span></text:span></text:p>
        </text:list-item>
        <text:list-item>
          <text:p text:style-name="P11"><text:span text:style-name="T2">Теперь просто сопоставьте поля :</text:span><text:span text:style-name="Strong_20_Emphasis"><text:span text:style-name="T1">мышкой</text:span></text:span></text:p>
          <text:list>
            <text:list-item>
              <text:p text:style-name="P11"><text:span text:style-name="T2">В поле </text:span><text:span text:style-name="Emphasis"><text:span text:style-name="T2">Имя клиента</text:span></text:span><text:span text:style-name="T2"> перетащите переменную, которую выдал парсер после обработки строчки .</text:span><text:span text:style-name="Source_20_Text"><text:span text:style-name="T3">Имя клиента:</text:span></text:span></text:p>
            </text:list-item>
            <text:list-item>
              <text:p text:style-name="P11"><text:span text:style-name="T2">В поле </text:span><text:span text:style-name="Emphasis"><text:span text:style-name="T2">Контакты</text:span></text:span><text:span text:style-name="T2"> перетащите очищенный номер телефона .</text:span><text:span text:style-name="Source_20_Text"><text:span text:style-name="T3">+44 79824552425</text:span></text:span></text:p>
            </text:list-item>
            <text:list-item>
              <text:p text:style-name="P11"><text:span text:style-name="T2">В поле </text:span><text:span text:style-name="Emphasis"><text:span text:style-name="T2">Сообщение</text:span></text:span><text:span text:style-name="T2"> перетащите всё, что идет после .</text:span><text:span text:style-name="Source_20_Text"><text:span text:style-name="T3">Сообщение клиента:</text:span></text:span></text:p>
            </text:list-item>
          </text:list>
        </text:list-item>
      </text:list>
      <text:p text:style-name="P3"/>
      <text:p text:style-name="P4">Шаг 6. Включение и проверка</text:p>
      <text:list text:style-name="L7">
        <text:list-item>
          <text:p text:style-name="P13"><text:span text:style-name="T2">Нажмите кнопку (Сохранить) в правом верхнем углу.</text:span><text:span text:style-name="Strong_20_Emphasis"><text:span text:style-name="T1">Save</text:span></text:span></text:p>
        </text:list-item>
        <text:list-item>
          <text:p text:style-name="P13"><text:span text:style-name="T2">Переключите тумблер в положение (Включено).</text:span><text:span text:style-name="Strong_20_Emphasis"><text:span text:style-name="T1">Apply / Live</text:span></text:span></text:p>
        </text:list-item>
        <text:list-item>
          <text:p text:style-name="P13"><text:span text:style-name="T2">Протестируйте: отправьте тестовую форму с сайта. Через 5–10 секунд во вкладке </text:span><text:span text:style-name="Emphasis"><text:span text:style-name="T2">History</text:span></text:span><text:span text:style-name="T2"> в Zoho Flow вы увидите успешный запуск, а в вашей таблице на ПК или iPhone сама собой появится новая заполненная строчка.</text:span></text:p>
        </text:list-item>
      </text:list>
      <text:p text:style-name="P4">Условия лимитов (Бесплатно)</text:p>
      <text:p text:style-name="P14"><text:span text:style-name="T2">У Zoho Flow отличный , который дает </text:span><text:span text:style-name="Strong_20_Emphasis"><text:span text:style-name="T1">бесплатный тариф (Free Plan)200 задач (выполнений) в месяц</text:span></text:span><text:span text:style-name="T2">. Поскольку у вас новый интернет-магазин и возвраты с вопросами будут единичными, этого тарифа вам гарантированно хватит на этапе старта. Если бизнес вырастет до сотен заявок, платный тариф стоит всего от $10 в месяц.</text:span></text:p>
      <text:p text:style-name="P14"><text:span text:style-name="T2">Хотите, я помогу написать с Zoho?</text:span><text:span text:style-name="Strong_20_Emphasis"><text:span text:style-name="T1">конкретные настройки для блока парсера текста</text:span></text:span><text:span text:style-name="T2"> (как именно прописать формулы, чтобы они безошибочно находили строчку или телефон), или у вас возникли вопросы по </text:span></text:p>
      <text:p text:style-name="P14"><text:span text:style-name="Source_20_Text"><text:span text:style-name="T3">Игорь Мерзляков</text:span></text:span><text:span text:style-name="Strong_20_Emphasis"><text:span text:style-name="T1">связи Google Таблиц</text:span></text:span></text:p>
      <text:section text:style-name="Sect1" text:name="shrproxy49">
        <text:p text:style-name="P14"/>
      </text:section>
      <text:section text:style-name="Sect1" text:name="fbproxy50">
        <text:p text:style-name="P1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8T21:10:54.969627400</meta:creation-date>
    <dc:date>2026-07-08T21:10:59.610850900</dc:date>
    <meta:editing-duration>PT5S</meta:editing-duration>
    <meta:editing-cycles>1</meta:editing-cycles>
    <meta:document-statistic meta:table-count="0" meta:image-count="0" meta:object-count="0" meta:page-count="2" meta:paragraph-count="46" meta:word-count="570" meta:character-count="3793" meta:non-whitespace-character-count="3299"/>
    <meta:generator>LibreOffice/26.2.4.2$Windows_X86_64 LibreOffice_project/0229ac93fcf0d7cbc6376066c6f35021cef002dc</meta:generator>
  </office:meta>
</office:document-meta>
</file>