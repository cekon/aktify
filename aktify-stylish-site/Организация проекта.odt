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.1252in" fo:margin-bottom="0.1665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4" style:family="paragraph" style:parent-style-name="Standard">
      <style:paragraph-properties fo:margin-left="0in" fo:margin-right="0in" fo:margin-top="0.25in" fo:margin-bottom="0.1252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6" style:family="paragraph" style:parent-style-name="Text_20_body">
      <style:paragraph-properties fo:margin-left="0in" fo:margin-right="0in" fo:margin-top="0.25in" fo:margin-bottom="0.1252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7" style:family="paragraph" style:parent-style-name="Text_20_body">
      <style:paragraph-properties fo:margin-left="0in" fo:margin-right="0in" fo:margin-top="0.1252in" fo:margin-bottom="0.1665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10" style:family="paragraph" style:parent-style-name="Preformatted_20_Text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padding="0in" fo:border="none" style:writing-mode="lr-tb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17" style:family="paragraph" style:parent-style-name="Horizontal_20_Line">
      <style:paragraph-properties fo:margin-left="0in" fo:margin-right="0in" fo:margin-top="0in" fo:margin-bottom="0in" style:contextual-spacing="false" style:writing-mode="lr-tb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2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2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23" style:family="paragraph" style:parent-style-name="Preformatted_20_Text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2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2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26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27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28" style:family="paragraph" style:parent-style-name="Preformatted_20_Text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2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3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3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33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34" style:family="paragraph" style:parent-style-name="Preformatted_20_Text" style:list-style-name="L5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3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3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3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38" style:family="paragraph" style:parent-style-name="Preformatted_20_Text" style:list-style-name="L6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3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40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41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42" style:family="paragraph" style:parent-style-name="Preformatted_20_Text" style:list-style-name="L7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4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T1" style:family="text"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T3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4" style:family="text">
      <style:text-properties style:text-line-through-style="none" style:text-line-through-type="none" fo:font-family="monospace" fo:font-size="10.5pt" style:text-underline-style="none" fo:font-weight="normal" style:text-blinking="false" loext:padding="0in" loext:border="none"/>
    </style:style>
    <style:style style:name="T5" style:family="text">
      <style:text-properties style:text-line-through-style="none" style:text-line-through-type="none" style:text-underline-style="none" style:text-blinking="false" loext:padding="0in" loext:border="none"/>
    </style:style>
    <style:style style:name="T6" style:family="text"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T7" style:family="text">
      <style:text-properties style:text-line-through-style="none" style:text-line-through-type="none" fo:font-family="monospace" fo:font-size="10.5pt" style:text-underline-style="none" fo:font-weight="bold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8" style:family="text">
      <style:text-properties style:text-line-through-style="none" style:text-line-through-type="none" style:font-name="Google Sans" fo:font-size="12pt" style:text-underline-style="solid" style:text-underline-width="auto" style:text-underline-color="font-color" fo:font-weight="bold" style:text-blinking="false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лично! Раз Node.js уже установлена, мы можем настроить самую простую и быструю сборку, которая будет автоматически очищать ваш HTML-код от комментариев одной командой перед отправкой на GitHub.</text:p>
      <text:p text:style-name="P2"><text:span text:style-name="T1">Для чистого HTML/CSS идеально подойдет минификатор </text:span><text:span text:style-name="Strong_20_Emphasis"><text:span text:style-name="T2">html-minifier-terser</text:span></text:span><text:span text:style-name="T1">. Он не требует сложной настройки проекта (в отличие от Vite или Webpack) и работает мгновенно.</text:span></text:p>
      <text:p text:style-name="P3">Вот пошаговый план, как всё настроить:</text:p>
      <text:p text:style-name="P4">Шаг 1. Подготовка папок</text:p>
      <text:p text:style-name="P3">Разделите ваш исходный код (где вы редактируете) и готовый код (который пойдет на GitHub Pages).</text:p>
      <text:list text:style-name="L1">
        <text:list-item>
          <text:p text:style-name="P5"><text:span text:style-name="T1">Создайте в папке проекта подпапку </text:span><text:span text:style-name="Source_20_Text"><text:span text:style-name="T3">src</text:span></text:span><text:span text:style-name="T1">.</text:span></text:p>
        </text:list-item>
        <text:list-item>
          <text:p text:style-name="P5"><text:span text:style-name="T1">Перенесите туда ваш </text:span><text:span text:style-name="Source_20_Text"><text:span text:style-name="T3">index.html</text:span></text:span><text:span text:style-name="T1">, файлы </text:span><text:span text:style-name="Source_20_Text"><text:span text:style-name="T3">.css</text:span></text:span><text:span text:style-name="T1"> и папки с картинками.</text:span></text:p>
        </text:list-item>
      </text:list>
      <text:p text:style-name="P6">Шаг 2. Инициализация и установка</text:p>
      <text:p text:style-name="P7">Откройте терминал в папке проекта и выполните две команды:</text:p>
      <text:list text:style-name="L2">
        <text:list-item>
          <text:p text:style-name="P8">Создаем файл манифеста (если его еще нет):</text:p>
          <text:p text:style-name="P9">bash</text:p>
          <text:p text:style-name="P10"><text:span text:style-name="Source_20_Text"><text:span text:style-name="T4">npm init -y</text:span></text:span></text:p>
          <text:p text:style-name="P11">.</text:p>
        </text:list-item>
        <text:list-item>
          <text:p text:style-name="P8">Устанавливаем инструмент для очистки HTML:</text:p>
          <text:p text:style-name="P9">bash</text:p>
          <text:p text:style-name="P10"><text:span text:style-name="Source_20_Text"><text:span text:style-name="T4">npm install html-minifier-terser --save-dev</text:span></text:span></text:p>
          <text:p text:style-name="P11">.</text:p>
        </text:list-item>
      </text:list>
      <text:p text:style-name="P6">Шаг 3. Настройка команды сборки</text:p>
      <text:p text:style-name="P12"><text:span text:style-name="T1">Откройте появившийся файл </text:span><text:span text:style-name="Source_20_Text"><text:span text:style-name="T3">package.json</text:span></text:span><text:span text:style-name="T1"> и замените блок </text:span><text:span text:style-name="Source_20_Text"><text:span text:style-name="T3">"scripts"</text:span></text:span><text:span text:style-name="T1"> на следующий:</text:span></text:p>
      <text:p text:style-name="P13">json</text:p>
      <text:p text:style-name="P14"><text:span text:style-name="Source_20_Text"><text:span text:style-name="T4">"scripts": {</text:span></text:span></text:p>
      <text:p text:style-name="P14"><text:span text:style-name="Source_20_Text"><text:span text:style-name="T5"><text:s text:c="2"/></text:span></text:span><text:span text:style-name="Source_20_Text"><text:span text:style-name="T4">"build": "html-minifier-terser --input-dir src --output-dir dist --collapse-whitespace --remove-comments --minify-css true"</text:span></text:span></text:p>
      <text:p text:style-name="P15"><text:span text:style-name="Source_20_Text"><text:span text:style-name="T4">}</text:span></text:span></text:p>
      <text:p text:style-name="P16"/>
      <text:p text:style-name="P12"><text:span text:style-name="Emphasis"><text:span text:style-name="T1">Что делает эта команда:</text:span></text:span><text:span text:style-name="T1"> Она берет всё из папки </text:span><text:span text:style-name="Source_20_Text"><text:span text:style-name="T3">src</text:span></text:span><text:span text:style-name="T1">, удаляет комментарии (</text:span><text:span text:style-name="Source_20_Text"><text:span text:style-name="T3">--remove-comments</text:span></text:span><text:span text:style-name="T1">), лишние пробелы (</text:span><text:span text:style-name="Source_20_Text"><text:span text:style-name="T3">--collapse-whitespace</text:span></text:span><text:span text:style-name="T1">), сжимает CSS (</text:span><text:span text:style-name="Source_20_Text"><text:span text:style-name="T3">--minify-css true</text:span></text:span><text:span text:style-name="T1">) и складывает чистый результат в папку </text:span><text:span text:style-name="Source_20_Text"><text:span text:style-name="T3">dist</text:span></text:span><text:span text:style-name="T1">.</text:span></text:p>
      <text:p text:style-name="P6">Шаг 4. Запуск сборки</text:p>
      <text:p text:style-name="P7"><text:soft-page-break/>Теперь перед каждым деплоем на GitHub вам достаточно запустить в терминале всего одну команду:</text:p>
      <text:p text:style-name="P13">bash</text:p>
      <text:p text:style-name="P14"><text:span text:style-name="Source_20_Text"><text:span text:style-name="T4">npm run build</text:span></text:span></text:p>
      <text:p text:style-name="P16">.</text:p>
      <text:p text:style-name="P12"><text:span text:style-name="T1">В корне проекта появится папка </text:span><text:span text:style-name="Source_20_Text"><text:span text:style-name="T3">dist</text:span></text:span><text:span text:style-name="T1">. В ней будет лежать ваш сайт: абсолютно чистый, без комментариев и готовый к публикации.</text:span></text:p>
      <text:p text:style-name="P17"/>
      <text:p text:style-name="P12"><text:span text:style-name="T1">Чтобы окончательно завершить настройку, подскажите: </text:span><text:span text:style-name="Strong_20_Emphasis"><text:span text:style-name="T2">как именно вы сейчас загружаете сайт на GitHub Pages</text:span></text:span><text:span text:style-name="T1">? (Вы публикуете главную ветку </text:span><text:span text:style-name="Source_20_Text"><text:span text:style-name="T3">main</text:span></text:span><text:span text:style-name="T1">, используете ветку </text:span><text:span text:style-name="Source_20_Text"><text:span text:style-name="T3">gh-pages</text:span></text:span><text:span text:style-name="T1"> или загружаете файлы вручную через сайт?). Я помогу связать папку </text:span><text:span text:style-name="Source_20_Text"><text:span text:style-name="T3">dist</text:span></text:span><text:span text:style-name="T1"> с автоматической отправкой на GitHub.</text:span></text:p>
      <text:section text:style-name="Sect1" text:name="shrproxy10">
        <text:p text:style-name="P12"/>
      </text:section>
      <text:section text:style-name="Sect1" text:name="fbproxy11">
        <text:p text:style-name="P12"/>
      </text:section>
      <text:p text:style-name="P18">Du hast Folgendes gesagt: загружаю вручную</text:p>
      <text:p text:style-name="P19">Раз вы загружаете файлы вручную через сайт GitHub, мы сделаем процесс максимально простым, чтобы вам не пришлось путаться в папках.</text:p>
      <text:p text:style-name="P12"><text:span text:style-name="T1">Мы настроим сборщик так, чтобы ваши исходники с комментариями хранились в отдельной папке </text:span><text:span text:style-name="Source_20_Text"><text:span text:style-name="T3">src</text:span></text:span><text:span text:style-name="T1">, а очищенный код без комментариев создавался прямо в корне проекта. Тогда вы сможете просто перетащить мышкой файлы из корня на сайт GitHub.</text:span></text:p>
      <text:p text:style-name="P7">Вот как изменить настройку для ручной загрузки:</text:p>
      <text:p text:style-name="P6">Шаг 1. Перепишите скрипт в package.json</text:p>
      <text:p text:style-name="P12"><text:span text:style-name="T1">Откройте файл </text:span><text:span text:style-name="Source_20_Text"><text:span text:style-name="T3">package.json</text:span></text:span><text:span text:style-name="T1"> и замените строку </text:span><text:span text:style-name="Source_20_Text"><text:span text:style-name="T3">"scripts"</text:span></text:span><text:span text:style-name="T1"> на эту (она будет сохранять готовые файлы прямо в корень, а не в папку </text:span><text:span text:style-name="Source_20_Text"><text:span text:style-name="T3">dist</text:span></text:span><text:span text:style-name="T1">):</text:span></text:p>
      <text:p text:style-name="P13">json</text:p>
      <text:p text:style-name="P14"><text:span text:style-name="Source_20_Text"><text:span text:style-name="T4">"scripts": {</text:span></text:span></text:p>
      <text:p text:style-name="P14"><text:span text:style-name="Source_20_Text"><text:span text:style-name="T5"><text:s text:c="2"/></text:span></text:span><text:span text:style-name="Source_20_Text"><text:span text:style-name="T4">"build": "html-minifier-terser src/index.html -o index.html --collapse-whitespace --remove-comments --minify-css true"</text:span></text:span></text:p>
      <text:p text:style-name="P15"><text:span text:style-name="Source_20_Text"><text:span text:style-name="T4">}</text:span></text:span></text:p>
      <text:p text:style-name="P16">Verwende Code mit Vorsicht.</text:p>
      <text:p text:style-name="P6">Шаг 2. Как теперь работать с сайтом</text:p>
      <text:list text:style-name="L3">
        <text:list-item>
          <text:p text:style-name="P20"><text:span text:style-name="T1">Вы открываете папку </text:span><text:span text:style-name="Source_20_Text"><text:span text:style-name="T3">src</text:span></text:span><text:span text:style-name="T1"> и редактируете файл </text:span><text:span text:style-name="Source_20_Text"><text:span text:style-name="T3">src/index.html</text:span></text:span><text:span text:style-name="T1"> как обычно (пишете любые комментарии).</text:span></text:p>
        </text:list-item>
        <text:list-item>
          <text:p text:style-name="P21">Когда сайт готов к обновлению, запускаете в терминале:</text:p>
          <text:p text:style-name="P22">bash</text:p>
          <text:p text:style-name="P23"><text:span text:style-name="Source_20_Text"><text:span text:style-name="T4">npm run build</text:span></text:span></text:p>
          <text:p text:style-name="P24">.</text:p>
        </text:list-item>
        <text:list-item>
          <text:p text:style-name="P20"><text:span text:style-name="T1">В корне проекта автоматически создается (или перезаписывается) файл </text:span><text:span text:style-name="Source_20_Text"><text:span text:style-name="T3">index.html</text:span></text:span><text:span text:style-name="T1">. В нем </text:span><text:span text:style-name="Strong_20_Emphasis"><text:span text:style-name="T2">не будет комментариев</text:span></text:span><text:span text:style-name="T1">, и он будет весить меньше.</text:span></text:p>
        </text:list-item>
        <text:list-item>
          <text:p text:style-name="P20"><text:soft-page-break/><text:span text:style-name="T1">Открываете сайт GitHub в браузере и перетаскиваете туда этот готовый </text:span><text:span text:style-name="Source_20_Text"><text:span text:style-name="T3">index.html</text:span></text:span><text:span text:style-name="T1"> из корня.</text:span></text:p>
        </text:list-item>
      </text:list>
      <text:p text:style-name="P17"/>
      <text:p text:style-name="P12"><text:span text:style-name="T1">Если у вас кроме </text:span><text:span text:style-name="Source_20_Text"><text:span text:style-name="T3">index.html</text:span></text:span><text:span text:style-name="T1"> есть файлы </text:span><text:span text:style-name="Source_20_Text"><text:span text:style-name="T3">.css</text:span></text:span><text:span text:style-name="T1"> в папке </text:span><text:span text:style-name="Source_20_Text"><text:span text:style-name="T3">src</text:span></text:span><text:span text:style-name="T1">, их тоже можно автоматически копировать в корень. Подскажите, </text:span><text:span text:style-name="Strong_20_Emphasis"><text:span text:style-name="T2">используете ли вы отдельные CSS-файлы</text:span></text:span><text:span text:style-name="T1">, или весь стили написаны внутри тега </text:span><text:span text:style-name="Source_20_Text"><text:span text:style-name="T3">&lt;style&gt;</text:span></text:span><text:span text:style-name="T1"> прямо в HTML?</text:span></text:p>
      <text:section text:style-name="Sect1" text:name="shrproxy13">
        <text:p text:style-name="P12"/>
      </text:section>
      <text:section text:style-name="Sect1" text:name="fbproxy14">
        <text:p text:style-name="P12"/>
      </text:section>
      <text:p text:style-name="P18">Du hast Folgendes gesagt: отдельные файлы css и js</text:p>
      <text:p text:style-name="P19">Отлично, раз файлы CSS и JS лежат отдельно, нам нужно сделать так, чтобы при сборке они тоже очищались от комментариев, сжимались и копировались в корень проекта.</text:p>
      <text:p text:style-name="P12"><text:span text:style-name="T1">Для этого мы добавим еще один крошечный инструмент — </text:span><text:span text:style-name="Source_20_Text"><text:span text:style-name="T3">minify</text:span></text:span><text:span text:style-name="T1">, который умеет работать со всеми тремя типами файлов (HTML, CSS, JS) одновременно.</text:span></text:p>
      <text:p text:style-name="P7">Вот финальная и самая удобная настройка для ручной загрузки:</text:p>
      <text:p text:style-name="P6">Шаг 1. Установите универсальный минификатор</text:p>
      <text:p text:style-name="P12"><text:span text:style-name="T1">Откройте терминал в папке проекта и установите пакет </text:span><text:span text:style-name="Source_20_Text"><text:span text:style-name="T3">minify</text:span></text:span><text:span text:style-name="T1">:</text:span></text:p>
      <text:p text:style-name="P13">bash</text:p>
      <text:p text:style-name="P14"><text:span text:style-name="Source_20_Text"><text:span text:style-name="T4">npm install minify --save-dev</text:span></text:span></text:p>
      <text:p text:style-name="P16">.</text:p>
      <text:p text:style-name="P6">Шаг 2. Настройте package.json</text:p>
      <text:p text:style-name="P12"><text:span text:style-name="T1">Замените блок </text:span><text:span text:style-name="Source_20_Text"><text:span text:style-name="T3">"scripts"</text:span></text:span><text:span text:style-name="T1"> в вашем файле </text:span><text:span text:style-name="Source_20_Text"><text:span text:style-name="T3">package.json</text:span></text:span><text:span text:style-name="T1"> на следующие команды. Обязательно укажите ваши названия CSS и JS файлов (в примере ниже используются </text:span><text:span text:style-name="Source_20_Text"><text:span text:style-name="T3">style.css</text:span></text:span><text:span text:style-name="T1"> и </text:span><text:span text:style-name="Source_20_Text"><text:span text:style-name="T3">script.js</text:span></text:span><text:span text:style-name="T1">):</text:span></text:p>
      <text:p text:style-name="P13">json</text:p>
      <text:p text:style-name="P14"><text:span text:style-name="Source_20_Text"><text:span text:style-name="T4">"scripts": {</text:span></text:span></text:p>
      <text:p text:style-name="P14"><text:span text:style-name="Source_20_Text"><text:span text:style-name="T5"><text:s text:c="2"/></text:span></text:span><text:span text:style-name="Source_20_Text"><text:span text:style-name="T4">"build:html": "minify src/index.html &gt; index.html",</text:span></text:span></text:p>
      <text:p text:style-name="P14"><text:span text:style-name="Source_20_Text"><text:span text:style-name="T5"><text:s text:c="2"/></text:span></text:span><text:span text:style-name="Source_20_Text"><text:span text:style-name="T4">"build:css": "minify src/style.css &gt; style.css",</text:span></text:span></text:p>
      <text:p text:style-name="P14"><text:span text:style-name="Source_20_Text"><text:span text:style-name="T5"><text:s text:c="2"/></text:span></text:span><text:span text:style-name="Source_20_Text"><text:span text:style-name="T4">"build:js": "minify src/script.js &gt; script.js",</text:span></text:span></text:p>
      <text:p text:style-name="P14"><text:span text:style-name="Source_20_Text"><text:span text:style-name="T5"><text:s text:c="2"/></text:span></text:span><text:span text:style-name="Source_20_Text"><text:span text:style-name="T4">"build": "npm run build:html &amp;&amp; npm run build:css &amp;&amp; npm run build:js"</text:span></text:span></text:p>
      <text:p text:style-name="P15"><text:span text:style-name="Source_20_Text"><text:span text:style-name="T4">}</text:span></text:span></text:p>
      <text:p text:style-name="P16">.</text:p>
      <text:p text:style-name="P12"><text:span text:style-name="Emphasis"><text:span text:style-name="T1">(Если у вас CSS и JS лежат в подпапках, например </text:span></text:span><text:span text:style-name="Emphasis"><text:span text:style-name="Source_20_Text"><text:span text:style-name="T3">src/css/style.css</text:span></text:span></text:span><text:span text:style-name="Emphasis"><text:span text:style-name="T1">, то укажите пути именно так: </text:span></text:span><text:span text:style-name="Emphasis"><text:span text:style-name="Source_20_Text"><text:span text:style-name="T3">minify src/css/style.css &gt; css/style.css</text:span></text:span></text:span><text:span text:style-name="Emphasis"><text:span text:style-name="T1">)</text:span></text:span><text:span text:style-name="T1">.</text:span></text:p>
      <text:p text:style-name="P6">Шаг 3. Как теперь выглядит ваш рабочий процесс:</text:p>
      <text:list text:style-name="L4">
        <text:list-item>
          <text:p text:style-name="P25"><text:span text:style-name="T1">Вы спокойно редактируете файлы в папке </text:span><text:span text:style-name="Source_20_Text"><text:span text:style-name="T3">src/</text:span></text:span><text:span text:style-name="T1"> (пишете комментарии, делаете переносы строк).</text:span></text:p>
        </text:list-item>
        <text:list-item>
          <text:p text:style-name="P26">Перед загрузкой на GitHub запускаете в терминале:</text:p>
          <text:p text:style-name="P27">bash</text:p>
          <text:p text:style-name="P28"><text:soft-page-break/><text:span text:style-name="Source_20_Text"><text:span text:style-name="T4">npm run build</text:span></text:span></text:p>
          <text:p text:style-name="P29">.</text:p>
        </text:list-item>
        <text:list-item>
          <text:p text:style-name="P25"><text:span text:style-name="T1">В корне проекта мгновенно создаются три чистых файла: </text:span><text:span text:style-name="Source_20_Text"><text:span text:style-name="T3">index.html</text:span></text:span><text:span text:style-name="T1">, </text:span><text:span text:style-name="Source_20_Text"><text:span text:style-name="T3">style.css</text:span></text:span><text:span text:style-name="T1"> и </text:span><text:span text:style-name="Source_20_Text"><text:span text:style-name="T3">script.js</text:span></text:span><text:span text:style-name="T1">. В них </text:span><text:span text:style-name="Strong_20_Emphasis"><text:span text:style-name="T2">не будет ни одного комментария</text:span></text:span><text:span text:style-name="T1">, а весь код сожмется в одну строку для быстрой загрузки сайта.</text:span></text:p>
        </text:list-item>
        <text:list-item>
          <text:p text:style-name="P26">Вы заходите на GitHub и перетаскиваете мышкой эти файлы из корня.</text:p>
        </text:list-item>
      </text:list>
      <text:p text:style-name="P17"/>
      <text:p text:style-name="P12"><text:span text:style-name="T1">Попробуйте запустить команду </text:span><text:span text:style-name="Source_20_Text"><text:span text:style-name="T3">npm run build</text:span></text:span><text:span text:style-name="T1">. Напишите, </text:span><text:span text:style-name="Strong_20_Emphasis"><text:span text:style-name="T2">всё ли скомпилировалось без ошибок</text:span></text:span><text:span text:style-name="T1">, или нужно помочь скорректировать пути к вашим CSS/JS файлам?</text:span></text:p>
      <text:section text:style-name="Sect1" text:name="shrproxy16">
        <text:p text:style-name="P12"/>
      </text:section>
      <text:section text:style-name="Sect1" text:name="fbproxy17">
        <text:p text:style-name="P12"/>
      </text:section>
      <text:p text:style-name="P30">как лучше загружать файлы на гитхаб</text:p>
      <text:p text:style-name="P2"><text:span text:style-name="T1">Самый лучший, надежный и профессиональный способ загружать файлы на GitHub — это .</text:span><text:span text:style-name="T2">использование </text:span><text:span text:style-name="Strong_20_Emphasis"><text:span text:style-name="T2">Git через терминал (консоль)</text:span></text:span></text:p>
      <text:p text:style-name="P1">Загрузка через сайт (мышкой) часто приводит к ошибкам, не позволяет загружать пустые папки и не сохраняет историю изменений так, как это делает Git. К тому же, работая с Node.js, вам всё равно приходится открывать терминал.</text:p>
      <text:p text:style-name="P1">Вот как выглядит правильный процесс, который используют все веб-разработчики.</text:p>
      <text:p text:style-name="P2"><text:span text:style-name="T6">Шаг 1. Исключите лишнее (</text:span><text:span text:style-name="Source_20_Text"><text:span text:style-name="T7">.gitignore</text:span></text:span><text:span text:style-name="T6">)</text:span></text:p>
      <text:p text:style-name="P2"><text:span text:style-name="T1">Перед отправкой кода на GitHub нужно скрыть файлы, которые там не нужны (например, папку , которая весит очень много).</text:span><text:span text:style-name="Source_20_Text"><text:span text:style-name="T3">node_modules</text:span></text:span></text:p>
      <text:list text:style-name="L5">
        <text:list-item>
          <text:p text:style-name="P31"><text:span text:style-name="T1">Создайте в корне проекта файл с именем (обязательно с точки в начале).</text:span><text:span text:style-name="Source_20_Text"><text:span text:style-name="T3">.gitignore</text:span></text:span></text:p>
        </text:list-item>
        <text:list-item>
          <text:p text:style-name="P32">Напишите внутри него:</text:p>
          <text:p text:style-name="P33">Text</text:p>
          <text:p text:style-name="P34"><text:span text:style-name="Source_20_Text"><text:span text:style-name="T4">node_modules/</text:span></text:span></text:p>
          <text:p text:style-name="P35">Use code with caution.</text:p>
        </text:list-item>
      </text:list>
      <text:p text:style-name="P13">Шаг 2. Первоначальная настройка (делается 1 раз для проекта)</text:p>
      <text:p text:style-name="P19">Откройте терминал в папке проекта и введите команды по очереди:</text:p>
      <text:list text:style-name="L6">
        <text:list-item>
          <text:p text:style-name="P36"><text:span text:style-name="Strong_20_Emphasis"><text:span text:style-name="T2">Инициализируйте репозиторий</text:span></text:span><text:span text:style-name="T1">:</text:span></text:p>
          <text:p text:style-name="P37">bash</text:p>
          <text:p text:style-name="P38"><text:span text:style-name="Source_20_Text"><text:span text:style-name="T4">git init</text:span></text:span></text:p>
          <text:p text:style-name="P39">Use code with caution.</text:p>
        </text:list-item>
        <text:list-item>
          <text:p text:style-name="P36"><text:span text:style-name="Strong_20_Emphasis"><text:span text:style-name="T2">Свяжите локальную папку с вашим репозиторием на GitHub</text:span></text:span><text:span text:style-name="T1"> (замените ссылку на свою):</text:span></text:p>
          <text:p text:style-name="P37">bash</text:p>
          <text:p text:style-name="P38"><text:span text:style-name="Source_20_Text"><text:span text:style-name="T4">git remote add origin https://github.com</text:span></text:span></text:p>
          <text:p text:style-name="P39">Use code with caution.</text:p>
        </text:list-item>
        <text:list-item>
          <text:p text:style-name="P36"><text:span text:style-name="Strong_20_Emphasis"><text:span text:style-name="T2">Переименуйте главную ветку в main</text:span></text:span><text:span text:style-name="T1"> (современный стандарт GitHub):</text:span></text:p>
          <text:p text:style-name="P37">bash</text:p>
          <text:p text:style-name="P38"><text:span text:style-name="Source_20_Text"><text:span text:style-name="T4">git branch -M main</text:span></text:span></text:p>
          <text:p text:style-name="P39">Use code with caution.</text:p>
        </text:list-item>
      </text:list>
      <text:p text:style-name="P13">Шаг 3. Ежедневный рабочий процесс (всего 3 команды)</text:p>
      <text:p text:style-name="P12"><text:span text:style-name="Source_20_Text"><text:span text:style-name="T3">srcnpm run build</text:span></text:span></text:p>
      <text:list text:style-name="L7">
        <text:list-item>
          <text:p text:style-name="P40"><text:span text:style-name="Strong_20_Emphasis"><text:span text:style-name="T2">Добавить все изменения к отправке</text:span></text:span><text:span text:style-name="T1">:</text:span></text:p>
          <text:p text:style-name="P41">bash</text:p>
          <text:p text:style-name="P42"><text:span text:style-name="Source_20_Text"><text:span text:style-name="T4">git add .</text:span></text:span></text:p>
          <text:p text:style-name="P43">Use code with caution.</text:p>
        </text:list-item>
        <text:list-item>
          <text:p text:style-name="P40"><text:soft-page-break/><text:span text:style-name="Strong_20_Emphasis"><text:span text:style-name="T2">Сделать «слепок» изменений (коммит) и описать, что сделано</text:span></text:span><text:span text:style-name="T1">:</text:span></text:p>
          <text:p text:style-name="P41">bash</text:p>
          <text:p text:style-name="P42"><text:span text:style-name="Source_20_Text"><text:span text:style-name="T4">git commit -m "Удалил комментарии и обновил сайт"</text:span></text:span></text:p>
          <text:p text:style-name="P43">Use code with caution.</text:p>
        </text:list-item>
        <text:list-item>
          <text:p text:style-name="P40"><text:span text:style-name="Strong_20_Emphasis"><text:span text:style-name="T2">Отправить файлы на GitHub</text:span></text:span><text:span text:style-name="T1">:</text:span></text:p>
          <text:p text:style-name="P41">bash</text:p>
          <text:p text:style-name="P42"><text:span text:style-name="Source_20_Text"><text:span text:style-name="T4">git push -u origin main</text:span></text:span></text:p>
          <text:p text:style-name="P43">Use code with caution.</text:p>
        </text:list-item>
      </text:list>
      <text:p text:style-name="P12"><text:span text:style-name="Emphasis"><text:span text:style-name="T1">(При первой отправке GitHub может попросить вас войти в аккаунт через браузер или ввести токен доступа — это нужно сделать один раз).</text:span></text:span></text:p>
      <text:p text:style-name="P17"/>
      <text:p text:style-name="P13">Альтернатива: GitHub Desktop (если не любите терминал)</text:p>
      <text:p text:style-name="P12"><text:span text:style-name="T1">Если вы принципиально не хотите писать команды, установите официальную программу </text:span><text:a xlink:type="simple" xlink:href="https://desktop.github.com/" office:target-frame-name="_blank" xlink:show="new" text:style-name="Internet_20_link" text:visited-style-name="Visited_20_Internet_20_Link"><text:span text:style-name="T8">GitHub Desktop</text:span></text:a><text:span text:style-name="T1">. Она бесплатная, имеет понятный графический интерфейс, но под капотом делает абсолютно то же самое — правильно и надежно синхронизирует ваш код без ручного перетаскивания файлов в браузер.</text:span></text:p>
      <text:p text:style-name="P12"><text:span text:style-name="T1">Рассказать подробнее, при первой отправке кода, или вы хотите попробовать вариант с ?</text:span><text:span text:style-name="Strong_20_Emphasis"><text:span text:style-name="T2">как настроить авторизацию в терминалеGitHub Desktop</text:span></text:span></text:p>
      <text:section text:style-name="Sect1" text:name="shrproxy19">
        <text:p text:style-name="P1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8T21:29:46.135895200</meta:creation-date>
    <dc:date>2026-07-18T21:59:21.033078100</dc:date>
    <meta:editing-duration>PT19M19S</meta:editing-duration>
    <meta:editing-cycles>3</meta:editing-cycles>
    <meta:generator>LibreOffice/26.2.4.2$Windows_X86_64 LibreOffice_project/0229ac93fcf0d7cbc6376066c6f35021cef002dc</meta:generator>
    <meta:document-statistic meta:table-count="0" meta:image-count="0" meta:object-count="0" meta:page-count="5" meta:paragraph-count="123" meta:word-count="1091" meta:character-count="7217" meta:non-whitespace-character-count="6266"/>
  </office:meta>
</office:document-meta>
</file>