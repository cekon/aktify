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=== ОРИГИНАЛЬНЫЙ НАЧАЛЬНЫЙ КОД ВАШЕГО ФАЙЛА (НЕ МЕНЯЕТСЯ) ===<text:line-break/>window.openGallery = function(p) {<text:line-break/> <text:s text:c="3"/>const modal = document.getElementById('productModal');<text:line-break/> <text:s text:c="3"/>if (!modal) return;<text:line-break/><text:line-break/> <text:s text:c="3"/>// Сбор медиа-файлов товара<text:line-break/> <text:s text:c="3"/>let mediaList = [];<text:line-break/> <text:s text:c="3"/>if (p.image) mediaList.push(p.image);<text:line-break/> <text:s text:c="3"/>if (p.images &amp;&amp; Array.isArray(p.images)) {<text:line-break/> <text:s text:c="7"/>p.images.forEach(img =&gt; { if (img &amp;&amp; !mediaList.includes(img)) mediaList.push(img); });<text:line-break/> <text:s text:c="3"/>}<text:line-break/> <text:s text:c="3"/>if (p.video &amp;&amp; !mediaList.includes(p.video)) {<text:line-break/> <text:s text:c="7"/>mediaList.push(p.video);<text:line-break/> <text:s text:c="3"/>}<text:line-break/><text:line-break/> <text:s text:c="3"/>// =========================================================================<text:line-break/> <text:s text:c="3"/>// НАЧАЛО НОВОЙ ВСТАВКИ (Исправленная версия без синтаксических ошибок)<text:line-break/> <text:s text:c="3"/>// =========================================================================<text:line-break/> <text:s text:c="3"/>const thumbsBox = modal.querySelector('.gallery-thumbs');<text:line-break/> <text:s text:c="3"/>const mainImg = modal.querySelector('.gallery-img');<text:line-break/> <text:s text:c="3"/>const videoEl = modal.querySelector('.gallery-video');<text:line-break/> <text:s text:c="3"/>const galleryStage = modal.querySelector('.gallery-stage');<text:line-break/><text:line-break/> <text:s text:c="3"/>let currentMediaIndex = 0;<text:line-break/> <text:s text:c="3"/>let touchStartX = 0;<text:line-break/> <text:s text:c="3"/>let touchEndX = 0;<text:line-break/><text:line-break/> <text:s text:c="3"/>function changeMainMedia(index) {<text:line-break/> <text:s text:c="7"/>if (index &lt; 0 || index &gt;= mediaList.length) return;<text:line-break/> <text:s text:c="7"/>currentMediaIndex = index;<text:line-break/> <text:s text:c="7"/>const src = mediaList[index];<text:line-break/><text:line-break/> <text:s text:c="7"/>if (thumbsBox) {<text:line-break/> <text:s text:c="11"/>thumbsBox.querySelectorAll('.thumb').forEach((el, idx) =&gt; {<text:line-break/> <text:s text:c="15"/>if (idx === index) el.classList.add('active');<text:line-break/> <text:s text:c="15"/>else el.classList.remove('active');<text:line-break/> <text:s text:c="11"/>});<text:line-break/> <text:s text:c="7"/>}<text:line-break/><text:line-break/> <text:s text:c="7"/>if (src.endsWith('.mp4')) {<text:line-break/> <text:s text:c="11"/>if (mainImg) mainImg.style.setProperty('display', 'none', 'important');<text:line-break/> <text:s text:c="11"/>if (videoEl) {<text:line-break/> <text:s text:c="15"/>videoEl.style.setProperty('display', 'block', 'important');<text:line-break/> <text:s text:c="15"/>videoEl.src = src;<text:line-break/> <text:s text:c="15"/>videoEl.controls = true;<text:line-break/> <text:s text:c="15"/>videoEl.autoplay = true;<text:line-break/> <text:s text:c="15"/>videoEl.muted = true;<text:line-break/> <text:s text:c="15"/>videoEl.style.width = '100%';<text:line-break/><text:soft-page-break/> <text:s text:c="15"/>videoEl.style.height = '100%';<text:line-break/> <text:s text:c="15"/>videoEl.style.objectFit = 'contain';<text:line-break/> <text:s text:c="11"/>}<text:line-break/> <text:s text:c="7"/>} else {<text:line-break/> <text:s text:c="11"/>if (videoEl) {<text:line-break/> <text:s text:c="15"/>videoEl.pause();<text:line-break/> <text:s text:c="15"/>videoEl.style.setProperty('display', 'none', 'important');<text:line-break/> <text:s text:c="11"/>}<text:line-break/> <text:s text:c="11"/>if (mainImg) {<text:line-break/> <text:s text:c="15"/>mainImg.style.setProperty('display', 'block', 'important');<text:line-break/> <text:s text:c="15"/>mainImg.style.opacity = '0.3';<text:line-break/> <text:s text:c="15"/>setTimeout(() =&gt; {<text:line-break/> <text:s text:c="19"/>mainImg.src = src;<text:line-break/> <text:s text:c="19"/>mainImg.style.opacity = '1';<text:line-break/> <text:s text:c="15"/>}, 100);<text:line-break/> <text:s text:c="11"/>}<text:line-break/> <text:s text:c="7"/>}<text:line-break/> <text:s text:c="3"/>}<text:line-break/><text:line-break/> <text:s text:c="3"/>if (galleryStage) {<text:line-break/> <text:s text:c="7"/>galleryStage.addEventListener('touchstart', (e) =&gt; {<text:line-break/> <text:s text:c="11"/>touchStartX = e.changedTouches.screenX;<text:line-break/> <text:s text:c="7"/>}, { passive: true });<text:line-break/><text:line-break/> <text:s text:c="7"/>galleryStage.addEventListener('touchend', (e) =&gt; {<text:line-break/> <text:s text:c="11"/>touchEndX = e.changedTouches.screenX;<text:line-break/> <text:s text:c="11"/>handleSwipe();<text:line-break/> <text:s text:c="7"/>}, { passive: true });<text:line-break/> <text:s text:c="3"/>}<text:line-break/><text:line-break/> <text:s text:c="3"/>function handleSwipe() {<text:line-break/> <text:s text:c="7"/>const swipeThreshold = 50;<text:line-break/> <text:s text:c="7"/>if (touchStartX - touchEndX &gt; swipeThreshold) {<text:line-break/> <text:s text:c="11"/>if (currentMediaIndex &lt; mediaList.length - 1) {<text:line-break/> <text:s text:c="15"/>changeMainMedia(currentMediaIndex + 1); // Свайп влево — следующий слайд<text:line-break/> <text:s text:c="11"/>}<text:line-break/> <text:s text:c="7"/>} else if (touchEndX - touchStartX &gt; swipeThreshold) {<text:line-break/> <text:s text:c="11"/>if (currentMediaIndex &gt; 0) {<text:line-break/> <text:s text:c="15"/>changeMainMedia(currentMediaIndex - 1); // ИСПРАВЛЕНО: Свайп вправо — предыдущий слайд<text:line-break/> <text:s text:c="11"/>}<text:line-break/> <text:s text:c="7"/>}<text:line-break/> <text:s text:c="3"/>}<text:line-break/><text:line-break/> <text:s text:c="3"/>if (galleryStage &amp;&amp; mainImg) {<text:line-break/> <text:s text:c="7"/>galleryStage.onclick = (e) =&gt; {<text:line-break/> <text:s text:c="11"/>if (mediaList[currentMediaIndex].endsWith('.mp4')) return;<text:line-break/> <text:s text:c="11"/>e.stopPropagation();<text:line-break/> <text:s text:c="11"/>galleryStage.classList.toggle('fullscreen');<text:line-break/> <text:s text:c="11"/>if (galleryStage.classList.contains('fullscreen')) {<text:line-break/> <text:s text:c="15"/>document.body.style.overflow = 'hidden';<text:line-break/> <text:s text:c="11"/>} else {<text:line-break/><text:soft-page-break/> <text:s text:c="15"/>document.body.style.overflow = 'auto';<text:line-break/> <text:s text:c="11"/>}<text:line-break/> <text:s text:c="7"/>};<text:line-break/> <text:s text:c="3"/>}<text:line-break/><text:line-break/> <text:s text:c="3"/>if (thumbsBox &amp;&amp; (mainImg || videoEl)) {<text:line-break/> <text:s text:c="7"/>thumbsBox.innerHTML = ""; <text:line-break/> <text:s text:c="7"/>if (mediaList.length === 0) {<text:line-break/> <text:s text:c="11"/>if (mainImg) {<text:line-break/> <text:s text:c="15"/>mainImg.style.display = 'block';<text:line-break/> <text:s text:c="15"/>mainImg.src = typeof getPlaceholderSvg === 'function' ? getPlaceholderSvg(p.title) : '';<text:line-break/> <text:s text:c="11"/>}<text:line-break/> <text:s text:c="11"/>if (videoEl) videoEl.style.display = 'none';<text:line-break/> <text:s text:c="7"/>} else {<text:line-break/> <text:s text:c="11"/>changeMainMedia(0);<text:line-break/> <text:s text:c="11"/><text:line-break/> <text:s text:c="11"/>mediaList.forEach((src, index) =&gt; {<text:line-break/> <text:s text:c="15"/>const thumbDiv = document.createElement('div');<text:line-break/> <text:s text:c="15"/>thumbDiv.className = 'thumb';<text:line-break/> <text:s text:c="15"/>if (index === 0) thumbDiv.classList.add('active');<text:line-break/> <text:s text:c="15"/><text:line-break/> <text:s text:c="15"/>if (src.endsWith('.mp4')) {<text:line-break/> <text:s text:c="19"/>thumbDiv.innerHTML = `&lt;div class="video-thumb-preview" style="background:#1a1a1a;color:#fff;display:flex;align-items:center;justify-content:center;font-size:11px;font-weight:bold;width:100%;height:100%;border-radius:4px;cursor:pointer;"&gt;Видео&lt;/div&gt;`;<text:line-break/> <text:s text:c="15"/>} else {<text:line-break/> <text:s text:c="19"/>const thumbImg = document.createElement('img');<text:line-break/> <text:s text:c="19"/>thumbImg.src = src;<text:line-break/> <text:s text:c="19"/>thumbImg.onerror = () =&gt; { <text:line-break/> <text:s text:c="23"/>if (typeof getPlaceholderSvg === 'function') thumbImg.src = getPlaceholderSvg('Ошибка'); <text:line-break/> <text:s text:c="19"/>};<text:line-break/> <text:s text:c="19"/>thumbDiv.appendChild(thumbImg);<text:line-break/> <text:s text:c="15"/>}<text:line-break/><text:line-break/> <text:s text:c="15"/>thumbDiv.addEventListener('click', (e) =&gt; {<text:line-break/> <text:s text:c="19"/>e.stopPropagation();<text:line-break/> <text:s text:c="19"/>changeMainMedia(index);<text:line-break/> <text:s text:c="15"/>});<text:line-break/> <text:s text:c="15"/>thumbsBox.appendChild(thumbDiv);<text:line-break/> <text:s text:c="11"/>});<text:line-break/> <text:s text:c="7"/>}<text:line-break/> <text:s text:c="3"/>}<text:line-break/> <text:s text:c="3"/>// =========================================================================<text:line-break/> <text:s text:c="3"/>// КОНЕЦ НОВОЙ ВСТАВКИ<text:line-break/> <text:s text:c="3"/>// =========================================================================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4T17:33:40.363674400</meta:creation-date>
    <dc:date>2026-07-14T17:57:08.747610700</dc:date>
    <meta:editing-duration>PT13M15S</meta:editing-duration>
    <meta:editing-cycles>1</meta:editing-cycles>
    <meta:document-statistic meta:table-count="0" meta:image-count="0" meta:object-count="0" meta:page-count="3" meta:paragraph-count="1" meta:word-count="425" meta:character-count="5670" meta:non-whitespace-character-count="3822"/>
    <meta:generator>LibreOffice/26.2.4.2$Windows_X86_64 LibreOffice_project/0229ac93fcf0d7cbc6376066c6f35021cef002dc</meta:generator>
  </office:meta>
</office:document-meta>
</file>