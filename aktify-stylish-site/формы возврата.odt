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3" style:family="paragraph" style:parent-style-name="Horizontal_20_Line">
      <style:paragraph-properties fo:margin-left="0in" fo:margin-right="0in" fo:margin-top="0in" fo:margin-bottom="0in" style:contextual-spacing="false" style:writing-mode="lr-tb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padding="0in" fo:border="none" style:writing-mode="lr-tb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9pt" style:text-underline-style="none" fo:font-weight="normal" style:text-blinking="false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text-underline-style="none" style:text-blinking="false" loext:padding="0in" loext:border="none"/>
    </style:style>
    <style:style style:name="P10" style:family="paragraph" style:parent-style-name="Quotations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Horizontal_20_Line">
      <style:paragraph-properties fo:margin-left="0in" fo:margin-right="0.4165in" fo:margin-top="0in" fo:margin-bottom="0in" style:contextual-spacing="false" fo:text-indent="0in" style:auto-text-indent="false" style:writing-mode="lr-tb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1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16" style:family="paragraph" style:parent-style-name="Preformatted_20_Text">
      <style:paragraph-properties fo:margin-left="0in" fo:margin-right="0.4165in" fo:margin-top="0in" fo:margin-bottom="0in" style:contextual-spacing="false" fo:text-indent="0in" style:auto-text-indent="false" fo:padding="0in" fo:border="none" style:writing-mode="lr-tb"/>
    </style:style>
    <style:style style:name="P1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18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19" style:family="paragraph" style:parent-style-name="Text_20_body">
      <style:paragraph-properties fo:margin-left="0in" fo:margin-right="0.4165in" fo:margin-top="0in" fo:margin-bottom="0in" style:contextual-spacing="false" fo:text-indent="0in" style:auto-text-indent="false" style:writing-mode="lr-tb"/>
    </style:style>
    <style:style style:name="P20" style:family="paragraph" style:parent-style-name="Text_20_body">
      <style:paragraph-properties fo:margin-left="0in" fo:margin-right="0.4063in" fo:margin-top="0in" fo:margin-bottom="0in" style:contextual-spacing="false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text-line-through-style="none" style:text-line-through-type="none" style:font-name="Google Sans" fo:font-size="10.5pt" style:text-underline-style="none" fo:font-weight="normal" style:text-blinking="false" style:font-name-asian="Google Sans" style:font-size-asian="10.5pt" style:font-weight-asian="normal" style:font-name-complex="Google Sans" style:font-size-complex="10.5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text-line-through-style="none" style:text-line-through-type="none" style:font-name="Arial2" fo:font-size="10.5pt" style:text-underline-style="none" fo:font-weight="normal" style:text-blinking="false" style:font-name-asian="Arial2" style:font-size-asian="10.5pt" style:font-weight-asian="normal" style:font-name-complex="Arial2" style:font-size-complex="10.5pt" style:font-weight-complex="normal" loext:padding="0in" loext:border="none"/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2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26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27" style:family="paragraph" style:parent-style-name="Preformatted_20_Text" style:list-style-name="L4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28" style:family="paragraph" style:parent-style-name="Preformatted_20_Text" style:list-style-name="L4">
      <style:paragraph-properties fo:margin-left="0in" fo:margin-right="0in" fo:margin-top="0in" fo:margin-bottom="0in" style:contextual-spacing="false" fo:padding="0in" fo:border="none" style:writing-mode="lr-tb"/>
    </style:style>
    <style:style style:name="P29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9pt" style:text-underline-style="none" fo:font-weight="normal" style:text-blinking="false" loext:padding="0in" loext:border="none"/>
    </style:style>
    <style:style style:name="T1" style:family="text"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T2" style:family="text">
      <style:text-properties style:text-line-through-style="none" style:text-line-through-type="none" style:font-name="Google Sans" fo:font-size="12pt" style:text-underline-style="none" fo:font-weight="bold" style:text-blinking="false" loext:padding="0in" loext:border="none"/>
    </style:style>
    <style:style style:name="T3" style:family="text"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T4" style:family="text">
      <style:text-properties style:text-line-through-style="none" style:text-line-through-type="none" fo:font-family="monospace" fo:font-size="10.5pt" style:text-underline-style="none" fo:font-weight="bold" style:text-blinking="false" loext:padding-left="0in" loext:padding-right="0in" loext:padding-top="0in" loext:padding-bottom="0.0193in" loext:border-left="none" loext:border-right="none" loext:border-top="none" loext:border-bottom="0.06pt solid #f0f2f5"/>
    </style:style>
    <style:style style:name="T5" style:family="text">
      <style:text-properties style:text-line-through-style="none" style:text-line-through-type="none" fo:font-family="monospace" fo:font-size="10.5pt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f0f2f5"/>
    </style:style>
    <style:style style:name="T6" style:family="text">
      <style:text-properties style:text-line-through-style="none" style:text-line-through-type="none" fo:font-family="monospace" fo:font-size="10.5pt" style:text-underline-style="none" fo:font-weight="normal" style:text-blinking="false" loext:padding="0in" loext:border="none"/>
    </style:style>
    <style:style style:name="T7" style:family="text">
      <style:text-properties style:text-line-through-style="none" style:text-line-through-type="none" style:text-underline-style="none" style:text-blinking="false" loext:padding="0in" loext:border="none"/>
    </style:style>
    <style:style style:name="T8" style:family="text">
      <style:text-properties style:font-name="Google Sans" fo:font-size="15pt" fo:font-weight="bold"/>
    </style:style>
    <style:style style:name="T9" style:family="text">
      <style:text-properties style:text-line-through-style="none" style:text-line-through-type="none" style:font-name="Google Sans" fo:font-size="12pt" fo:language="en" fo:country="US" style:text-underline-style="none" fo:font-weight="normal" officeooo:rsid="0020b041" style:text-blinking="false" loext:padding="0in" loext:border="none"/>
    </style:style>
    <style:style style:name="T10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Для одностраничного сайта (лендинга) самым рациональным и современным решением будет сделать </text:span><text:span text:style-name="Strong_20_Emphasis"><text:span text:style-name="T2">одну универсальную форму</text:span></text:span><text:span text:style-name="T1">, которая меняет свой вид в зависимости от того, что выбрал пользователь (Вопрос, Отзыв или Возврат).</text:span></text:p>
      <text:p text:style-name="P1"><text:span text:style-name="T1">Поскольку у вас уже развернута инфраструктура (через бесплатного бота) или на рабочую силами того же самого воркера.</text:span><text:span text:style-name="Strong_20_Emphasis"><text:span text:style-name="T2">Cloudflare Workers</text:span></text:span><text:span text:style-name="T1">, вам не нужно покупать сторонние бэкенды или базы данных. Вы можете настроить отправку всех заявок прямо в ваш </text:span><text:span text:style-name="Strong_20_Emphasis"><text:span text:style-name="T2">TelegramEmail-почту</text:span></text:span></text:p>
      <text:p text:style-name="P2">Вот готовое, легкое в реализации решение: универсальная форма на сайте, которая открывается в виде аккуратного всплывающего окна (модалки) по клику на любую кнопку («Задать вопрос», «Оставить отзыв», «Заявка на возврат»).</text:p>
      <text:p text:style-name="P3"/>
      <text:p text:style-name="P4"><text:span text:style-name="T3">Шаг 1. Добавьте HTML-разметку формы (</text:span><text:span text:style-name="Source_20_Text"><text:span text:style-name="T4">index.html</text:span></text:span><text:span text:style-name="T3">)</text:span></text:p>
      <text:p text:style-name="P4"><text:span text:style-name="T1">Вставьте этот код в самый низ вашего файла (прямо перед закрывающим тегом ). Это универсальное окно обратной связи:</text:span><text:span text:style-name="Source_20_Text"><text:span text:style-name="T5">index.html&lt;/body&gt;</text:span></text:span></text:p>
      <text:p text:style-name="P5">html</text:p>
      <text:p text:style-name="P6"><text:span text:style-name="Source_20_Text"><text:span text:style-name="T6">&lt;!-- Кнопки для размещения в подвале (footer) или меню сайта --&gt;</text:span></text:span></text:p>
      <text:p text:style-name="P6"><text:span text:style-name="Source_20_Text"><text:span text:style-name="T6">&lt;div class="feedback-buttons"&gt;</text:span></text:span></text:p>
      <text:p text:style-name="P6"><text:span text:style-name="Source_20_Text"><text:span text:style-name="T7"><text:s text:c="2"/></text:span></text:span><text:span text:style-name="Source_20_Text"><text:span text:style-name="T6">&lt;button onclick="openFeedbackModal('question')"&gt;Задать вопрос&lt;/button&gt;</text:span></text:span></text:p>
      <text:p text:style-name="P6"><text:span text:style-name="Source_20_Text"><text:span text:style-name="T7"><text:s text:c="2"/></text:span></text:span><text:span text:style-name="Source_20_Text"><text:span text:style-name="T6">&lt;button onclick="openFeedbackModal('review')"&gt;Оставить отзыв&lt;/button&gt;</text:span></text:span></text:p>
      <text:p text:style-name="P6"><text:span text:style-name="Source_20_Text"><text:span text:style-name="T7"><text:s text:c="2"/></text:span></text:span><text:span text:style-name="Source_20_Text"><text:span text:style-name="T6">&lt;button onclick="openFeedbackModal('return')"&gt;Заявка на возврат&lt;/button&gt;</text:span></text:span></text:p>
      <text:p text:style-name="P6"><text:span text:style-name="Source_20_Text"><text:span text:style-name="T6">&lt;/div&gt;</text:span></text:span></text:p>
      <text:p text:style-name="P7"/>
      <text:p text:style-name="P6"><text:span text:style-name="Source_20_Text"><text:span text:style-name="T6">&lt;!-- Модальное окно обратной связи --&gt;</text:span></text:span></text:p>
      <text:p text:style-name="P6"><text:span text:style-name="Source_20_Text"><text:span text:style-name="T6">&lt;dialog id="feedback-modal" class="modal-dialog" style="display:none; justify-content:center; align-items:center; position:fixed; top:0; left:0; width:100%; height:100%; background:rgba(0,0,0,0.6); z-index:1000; border:none;"&gt;</text:span></text:span></text:p>
      <text:p text:style-name="P6"><text:span text:style-name="Source_20_Text"><text:span text:style-name="T7"><text:s text:c="2"/></text:span></text:span><text:span text:style-name="Source_20_Text"><text:span text:style-name="T6">&lt;div style="background:#1a1a1a; padding:30px; border-radius:12px; width:100%; max-width:400px; position:relative; box-shadow:0 10px 30px rgba(0,0,0,0.5); color:#fff; font-family:sans-serif;"&gt;</text:span></text:span></text:p>
      <text:p text:style-name="P6"><text:span text:style-name="Source_20_Text"><text:span text:style-name="T7"><text:s text:c="4"/></text:span></text:span><text:span text:style-name="Source_20_Text"><text:span text:style-name="T6">&lt;button onclick="closeFeedbackModal()" style="position:absolute; top:15px; right:15px; background:none; border:none; color:#aaa; font-size:24px; cursor:pointer;"&gt;&amp;times;&lt;/button&gt;</text:span></text:span></text:p>
      <text:p text:style-name="P7"><text:span text:style-name="Source_20_Text"><text:span text:style-name="T7"><text:s text:c="4"/></text:span></text:span></text:p>
      <text:p text:style-name="P6"><text:span text:style-name="Source_20_Text"><text:span text:style-name="T7"><text:s text:c="4"/></text:span></text:span><text:span text:style-name="Source_20_Text"><text:span text:style-name="T6">&lt;h3 id="feedback-title" style="margin-top:0; font-size:20px; color:#f3b653; text-transform:uppercase;"&gt;Обратная связь&lt;/h3&gt;</text:span></text:span></text:p>
      <text:p text:style-name="P7"><text:span text:style-name="Source_20_Text"><text:span text:style-name="T7"><text:s text:c="4"/></text:span></text:span></text:p>
      <text:p text:style-name="P6"><text:span text:style-name="Source_20_Text"><text:span text:style-name="T7"><text:s text:c="4"/></text:span></text:span><text:span text:style-name="Source_20_Text"><text:span text:style-name="T6">&lt;form id="feedback-form" onsubmit="sendFeedback(event)" style="display:flex; flex-direction:column; gap:15px; margin-top:20px;"&gt;</text:span></text:span></text:p>
      <text:p text:style-name="P6"><text:span text:style-name="Source_20_Text"><text:span text:style-name="T7"><text:s text:c="6"/></text:span></text:span><text:span text:style-name="Source_20_Text"><text:span text:style-name="T6">&lt;!-- Скрытое поле, чтобы скрипт знал тип заявки --&gt;</text:span></text:span></text:p>
      <text:p text:style-name="P6"><text:span text:style-name="Source_20_Text"><text:span text:style-name="T7"><text:s text:c="6"/></text:span></text:span><text:span text:style-name="Source_20_Text"><text:span text:style-name="T6">&lt;input type="hidden" id="feedback-type" name="type" value="question" /&gt;</text:span></text:span></text:p>
      <text:p text:style-name="P7"/>
      <text:p text:style-name="P6"><text:span text:style-name="Source_20_Text"><text:span text:style-name="T7"><text:s text:c="6"/></text:span></text:span><text:span text:style-name="Source_20_Text"><text:span text:style-name="T6">&lt;div&gt;</text:span></text:span></text:p>
      <text:p text:style-name="P6"><text:span text:style-name="Source_20_Text"><text:span text:style-name="T7"><text:s text:c="8"/></text:span></text:span><text:span text:style-name="Source_20_Text"><text:span text:style-name="T6">&lt;label style="display:block; font-size:12px; color:#aaa; margin-bottom:5px;"&gt;Ваше имя&lt;/label&gt;</text:span></text:span></text:p>
      <text:p text:style-name="P6"><text:span text:style-name="Source_20_Text"><text:span text:style-name="T7"><text:s text:c="8"/></text:span></text:span><text:span text:style-name="Source_20_Text"><text:span text:style-name="T6">&lt;input type="text" name="name" required style="width:100%; padding:10px; background:#2a2a2a; border:1px solid #444; border-radius:6px; color:#fff;" /&gt;</text:span></text:span></text:p>
      <text:p text:style-name="P6"><text:span text:style-name="Source_20_Text"><text:span text:style-name="T7"><text:s text:c="6"/></text:span></text:span><text:span text:style-name="Source_20_Text"><text:span text:style-name="T6">&lt;/div&gt;</text:span></text:span></text:p>
      <text:p text:style-name="P7"/>
      <text:p text:style-name="P6"><text:span text:style-name="Source_20_Text"><text:span text:style-name="T7"><text:s text:c="6"/></text:span></text:span><text:span text:style-name="Source_20_Text"><text:span text:style-name="T6">&lt;div&gt;</text:span></text:span></text:p>
      <text:p text:style-name="P6"><text:span text:style-name="Source_20_Text"><text:span text:style-name="T7"><text:s text:c="8"/></text:span></text:span><text:span text:style-name="Source_20_Text"><text:span text:style-name="T6">&lt;label style="display:block; font-size:12px; color:#aaa; margin-bottom:5px;"&gt;Телефон или Telegram&lt;/label&gt;</text:span></text:span></text:p>
      <text:p text:style-name="P6"><text:span text:style-name="Source_20_Text"><text:span text:style-name="T7"><text:s text:c="8"/></text:span></text:span><text:span text:style-name="Source_20_Text"><text:span text:style-name="T6">&lt;input type="text" name="contact" required style="width:100%; padding:10px; background:#2a2a2a; border:1px solid #444; border-radius:6px; color:#fff;" placeholder="+7 (999) 000-00-00 или @username" /&gt;</text:span></text:span></text:p>
      <text:p text:style-name="P6"><text:soft-page-break/><text:span text:style-name="Source_20_Text"><text:span text:style-name="T7"><text:s text:c="6"/></text:span></text:span><text:span text:style-name="Source_20_Text"><text:span text:style-name="T6">&lt;/div&gt;</text:span></text:span></text:p>
      <text:p text:style-name="P7"/>
      <text:p text:style-name="P6"><text:span text:style-name="Source_20_Text"><text:span text:style-name="T7"><text:s text:c="6"/></text:span></text:span><text:span text:style-name="Source_20_Text"><text:span text:style-name="T6">&lt;!-- Поле номера заказа (показывается только при возврате) --&gt;</text:span></text:span></text:p>
      <text:p text:style-name="P6"><text:span text:style-name="Source_20_Text"><text:span text:style-name="T7"><text:s text:c="6"/></text:span></text:span><text:span text:style-name="Source_20_Text"><text:span text:style-name="T6">&lt;div id="order-number-block" style="display:none;"&gt;</text:span></text:span></text:p>
      <text:p text:style-name="P6"><text:span text:style-name="Source_20_Text"><text:span text:style-name="T7"><text:s text:c="8"/></text:span></text:span><text:span text:style-name="Source_20_Text"><text:span text:style-name="T6">&lt;label style="display:block; font-size:12px; color:#aaa; margin-bottom:5px;"&gt;Номер заказа (если есть)&lt;/label&gt;</text:span></text:span></text:p>
      <text:p text:style-name="P6"><text:span text:style-name="Source_20_Text"><text:span text:style-name="T7"><text:s text:c="8"/></text:span></text:span><text:span text:style-name="Source_20_Text"><text:span text:style-name="T6">&lt;input type="text" name="order_number" style="width:100%; padding:10px; background:#2a2a2a; border:1px solid #444; border-radius:6px; color:#fff;" placeholder="AKTIFY-171983..." /&gt;</text:span></text:span></text:p>
      <text:p text:style-name="P6"><text:span text:style-name="Source_20_Text"><text:span text:style-name="T7"><text:s text:c="6"/></text:span></text:span><text:span text:style-name="Source_20_Text"><text:span text:style-name="T6">&lt;/div&gt;</text:span></text:span></text:p>
      <text:p text:style-name="P7"/>
      <text:p text:style-name="P6"><text:span text:style-name="Source_20_Text"><text:span text:style-name="T7"><text:s text:c="6"/></text:span></text:span><text:span text:style-name="Source_20_Text"><text:span text:style-name="T6">&lt;div&gt;</text:span></text:span></text:p>
      <text:p text:style-name="P6"><text:span text:style-name="Source_20_Text"><text:span text:style-name="T7"><text:s text:c="8"/></text:span></text:span><text:span text:style-name="Source_20_Text"><text:span text:style-name="T6">&lt;label id="message-label" style="display:block; font-size:12px; color:#aaa; margin-bottom:5px;"&gt;Ваш вопрос&lt;/label&gt;</text:span></text:span></text:p>
      <text:p text:style-name="P6"><text:span text:style-name="Source_20_Text"><text:span text:style-name="T7"><text:s text:c="8"/></text:span></text:span><text:span text:style-name="Source_20_Text"><text:span text:style-name="T6">&lt;textarea name="message" required rows="4" style="width:100%; padding:10px; background:#2a2a2a; border:1px solid #444; border-radius:6px; color:#fff; resize:none;"&gt;&lt;/textarea&gt;</text:span></text:span></text:p>
      <text:p text:style-name="P6"><text:span text:style-name="Source_20_Text"><text:span text:style-name="T7"><text:s text:c="6"/></text:span></text:span><text:span text:style-name="Source_20_Text"><text:span text:style-name="T6">&lt;/div&gt;</text:span></text:span></text:p>
      <text:p text:style-name="P7"/>
      <text:p text:style-name="P6"><text:span text:style-name="Source_20_Text"><text:span text:style-name="T7"><text:s text:c="6"/></text:span></text:span><text:span text:style-name="Source_20_Text"><text:span text:style-name="T6">&lt;button type="submit" id="feedback-submit-btn" style="background:#f3b653; color:#000; border:none; padding:12px; border-radius:6px; font-weight:bold; cursor:pointer; text-transform:uppercase; margin-top:10px;"&gt;Отправить&lt;/button&gt;</text:span></text:span></text:p>
      <text:p text:style-name="P6"><text:span text:style-name="Source_20_Text"><text:span text:style-name="T7"><text:s text:c="4"/></text:span></text:span><text:span text:style-name="Source_20_Text"><text:span text:style-name="T6">&lt;/form&gt;</text:span></text:span></text:p>
      <text:p text:style-name="P6"><text:span text:style-name="Source_20_Text"><text:span text:style-name="T7"><text:s text:c="2"/></text:span></text:span><text:span text:style-name="Source_20_Text"><text:span text:style-name="T6">&lt;/div&gt;</text:span></text:span></text:p>
      <text:p text:style-name="P6"><text:span text:style-name="Source_20_Text"><text:span text:style-name="T6">&lt;/dialog&gt;</text:span></text:span></text:p>
      <text:p text:style-name="P8">Use code with caution.</text:p>
      <text:p text:style-name="P3"/>
      <text:p text:style-name="P4"><text:span text:style-name="T3">Шаг 2. Добавьте логику управления формой в </text:span><text:span text:style-name="Source_20_Text"><text:span text:style-name="T4">assets/app.js</text:span></text:span></text:p>
      <text:p text:style-name="P4"><text:span text:style-name="T1">Допишите эти функции в самый конец вашего файла . Они динамически меняют заголовки формы и отправляют данные на ваш Cloudflare Worker:</text:span><text:span text:style-name="Source_20_Text"><text:span text:style-name="T5">assets/app.js</text:span></text:span></text:p>
      <text:p text:style-name="P5">JavaScript</text:p>
      <text:p text:style-name="P6"><text:span text:style-name="Source_20_Text"><text:span text:style-name="T6">// Функция открытия окна обратной связи</text:span></text:span></text:p>
      <text:p text:style-name="P6"><text:span text:style-name="Source_20_Text"><text:span text:style-name="T6">function openFeedbackModal(type) {</text:span></text:span></text:p>
      <text:p text:style-name="P6"><text:span text:style-name="Source_20_Text"><text:span text:style-name="T7"><text:s text:c="2"/></text:span></text:span><text:span text:style-name="Source_20_Text"><text:span text:style-name="T6">const modal = document.getElementById('feedback-modal');</text:span></text:span></text:p>
      <text:p text:style-name="P6"><text:span text:style-name="Source_20_Text"><text:span text:style-name="T7"><text:s text:c="2"/></text:span></text:span><text:span text:style-name="Source_20_Text"><text:span text:style-name="T6">const title = document.getElementById('feedback-title');</text:span></text:span></text:p>
      <text:p text:style-name="P6"><text:span text:style-name="Source_20_Text"><text:span text:style-name="T7"><text:s text:c="2"/></text:span></text:span><text:span text:style-name="Source_20_Text"><text:span text:style-name="T6">const typeInput = document.getElementById('feedback-type');</text:span></text:span></text:p>
      <text:p text:style-name="P6"><text:span text:style-name="Source_20_Text"><text:span text:style-name="T7"><text:s text:c="2"/></text:span></text:span><text:span text:style-name="Source_20_Text"><text:span text:style-name="T6">const orderBlock = document.getElementById('order-number-block');</text:span></text:span></text:p>
      <text:p text:style-name="P6"><text:span text:style-name="Source_20_Text"><text:span text:style-name="T7"><text:s text:c="2"/></text:span></text:span><text:span text:style-name="Source_20_Text"><text:span text:style-name="T6">const messageLabel = document.getElementById('message-label');</text:span></text:span></text:p>
      <text:p text:style-name="P6"><text:span text:style-name="Source_20_Text"><text:span text:style-name="T7"><text:s text:c="2"/></text:span></text:span><text:span text:style-name="Source_20_Text"><text:span text:style-name="T6">const form = document.getElementById('feedback-form');</text:span></text:span></text:p>
      <text:p text:style-name="P7"/>
      <text:p text:style-name="P6"><text:span text:style-name="Source_20_Text"><text:span text:style-name="T7"><text:s text:c="2"/></text:span></text:span><text:span text:style-name="Source_20_Text"><text:span text:style-name="T6">if (!modal) return;</text:span></text:span></text:p>
      <text:p text:style-name="P6"><text:span text:style-name="Source_20_Text"><text:span text:style-name="T7"><text:s text:c="2"/></text:span></text:span><text:span text:style-name="Source_20_Text"><text:span text:style-name="T6">form.reset(); // Очищаем поля формы при открытии</text:span></text:span></text:p>
      <text:p text:style-name="P7"><text:span text:style-name="Source_20_Text"><text:span text:style-name="T7"><text:s text:c="2"/></text:span></text:span><text:span text:style-name="Source_20_Text"><text:span text:style-name="T6">typeInput.value = type;</text:span></text:span></text:p>
      <text:p text:style-name="P7"/>
      <text:p text:style-name="P6"><text:span text:style-name="Source_20_Text"><text:span text:style-name="T7"><text:s text:c="2"/></text:span></text:span><text:span text:style-name="Source_20_Text"><text:span text:style-name="T6">// Динамически адаптируем форму под выбранный тип</text:span></text:span></text:p>
      <text:p text:style-name="P6"><text:span text:style-name="Source_20_Text"><text:span text:style-name="T7"><text:s text:c="2"/></text:span></text:span><text:span text:style-name="Source_20_Text"><text:span text:style-name="T6">if (type === 'return') {</text:span></text:span></text:p>
      <text:p text:style-name="P6"><text:span text:style-name="Source_20_Text"><text:span text:style-name="T7"><text:s text:c="4"/></text:span></text:span><text:span text:style-name="Source_20_Text"><text:span text:style-name="T6">title.textContent = "Заявка на возврат";</text:span></text:span></text:p>
      <text:p text:style-name="P6"><text:span text:style-name="Source_20_Text"><text:span text:style-name="T7"><text:s text:c="4"/></text:span></text:span><text:span text:style-name="Source_20_Text"><text:span text:style-name="T6">messageLabel.textContent = "Причина возврата";</text:span></text:span></text:p>
      <text:p text:style-name="P6"><text:span text:style-name="Source_20_Text"><text:span text:style-name="T7"><text:s text:c="4"/></text:span></text:span><text:span text:style-name="Source_20_Text"><text:span text:style-name="T6">orderBlock.style.display = "block"; // Показываем поле номера заказа</text:span></text:span></text:p>
      <text:p text:style-name="P6"><text:span text:style-name="Source_20_Text"><text:span text:style-name="T7"><text:s text:c="2"/></text:span></text:span><text:span text:style-name="Source_20_Text"><text:span text:style-name="T6">} else if (type === 'review') {</text:span></text:span></text:p>
      <text:p text:style-name="P6"><text:span text:style-name="Source_20_Text"><text:span text:style-name="T7"><text:s text:c="4"/></text:span></text:span><text:span text:style-name="Source_20_Text"><text:span text:style-name="T6">title.textContent = "Оставить отзыв";</text:span></text:span></text:p>
      <text:p text:style-name="P6"><text:span text:style-name="Source_20_Text"><text:span text:style-name="T7"><text:s text:c="4"/></text:span></text:span><text:span text:style-name="Source_20_Text"><text:span text:style-name="T6">messageLabel.textContent = "Ваш отзыв";</text:span></text:span></text:p>
      <text:p text:style-name="P6"><text:span text:style-name="Source_20_Text"><text:span text:style-name="T7"><text:s text:c="4"/></text:span></text:span><text:span text:style-name="Source_20_Text"><text:span text:style-name="T6">orderBlock.style.display = "none";</text:span></text:span></text:p>
      <text:p text:style-name="P6"><text:span text:style-name="Source_20_Text"><text:span text:style-name="T7"><text:s text:c="2"/></text:span></text:span><text:span text:style-name="Source_20_Text"><text:span text:style-name="T6">} else {</text:span></text:span></text:p>
      <text:p text:style-name="P6"><text:span text:style-name="Source_20_Text"><text:span text:style-name="T7"><text:s text:c="4"/></text:span></text:span><text:span text:style-name="Source_20_Text"><text:span text:style-name="T6">title.textContent = "Задать вопрос";</text:span></text:span></text:p>
      <text:p text:style-name="P6"><text:span text:style-name="Source_20_Text"><text:span text:style-name="T7"><text:s text:c="4"/></text:span></text:span><text:span text:style-name="Source_20_Text"><text:span text:style-name="T6">messageLabel.textContent = "Ваш вопрос";</text:span></text:span></text:p>
      <text:p text:style-name="P6"><text:span text:style-name="Source_20_Text"><text:span text:style-name="T7"><text:s text:c="4"/></text:span></text:span><text:span text:style-name="Source_20_Text"><text:span text:style-name="T6">orderBlock.style.display = "none";</text:span></text:span></text:p>
      <text:p text:style-name="P7"><text:span text:style-name="Source_20_Text"><text:span text:style-name="T7"><text:s text:c="2"/></text:span></text:span><text:span text:style-name="Source_20_Text"><text:span text:style-name="T6">}</text:span></text:span></text:p>
      <text:p text:style-name="P7"><text:soft-page-break/></text:p>
      <text:p text:style-name="P6"><text:span text:style-name="Source_20_Text"><text:span text:style-name="T7"><text:s text:c="2"/></text:span></text:span><text:span text:style-name="Source_20_Text"><text:span text:style-name="T6">modal.style.display = 'flex';</text:span></text:span></text:p>
      <text:p text:style-name="P6"><text:span text:style-name="Source_20_Text"><text:span text:style-name="T7"><text:s text:c="2"/></text:span></text:span><text:span text:style-name="Source_20_Text"><text:span text:style-name="T6">document.body.style.overflow = 'hidden';</text:span></text:span></text:p>
      <text:p text:style-name="P7"><text:span text:style-name="Source_20_Text"><text:span text:style-name="T6">}</text:span></text:span></text:p>
      <text:p text:style-name="P7"/>
      <text:p text:style-name="P6"><text:span text:style-name="Source_20_Text"><text:span text:style-name="T6">// Функция закрытия окна</text:span></text:span></text:p>
      <text:p text:style-name="P6"><text:span text:style-name="Source_20_Text"><text:span text:style-name="T6">function closeModal() {</text:span></text:span></text:p>
      <text:p text:style-name="P6"><text:span text:style-name="Source_20_Text"><text:span text:style-name="T7"><text:s text:c="2"/></text:span></text:span><text:span text:style-name="Source_20_Text"><text:span text:style-name="T6">// Старый код закрытия вашего товарного модального окна остается без изменений</text:span></text:span></text:p>
      <text:p text:style-name="P7"><text:span text:style-name="Source_20_Text"><text:span text:style-name="T6">}</text:span></text:span></text:p>
      <text:p text:style-name="P7"/>
      <text:p text:style-name="P6"><text:span text:style-name="Source_20_Text"><text:span text:style-name="T6">function closeFeedbackModal() {</text:span></text:span></text:p>
      <text:p text:style-name="P6"><text:span text:style-name="Source_20_Text"><text:span text:style-name="T7"><text:s text:c="2"/></text:span></text:span><text:span text:style-name="Source_20_Text"><text:span text:style-name="T6">const modal = document.getElementById('feedback-modal');</text:span></text:span></text:p>
      <text:p text:style-name="P6"><text:span text:style-name="Source_20_Text"><text:span text:style-name="T7"><text:s text:c="2"/></text:span></text:span><text:span text:style-name="Source_20_Text"><text:span text:style-name="T6">if (modal) {</text:span></text:span></text:p>
      <text:p text:style-name="P6"><text:span text:style-name="Source_20_Text"><text:span text:style-name="T7"><text:s text:c="4"/></text:span></text:span><text:span text:style-name="Source_20_Text"><text:span text:style-name="T6">modal.style.display = 'none';</text:span></text:span></text:p>
      <text:p text:style-name="P6"><text:span text:style-name="Source_20_Text"><text:span text:style-name="T7"><text:s text:c="4"/></text:span></text:span><text:span text:style-name="Source_20_Text"><text:span text:style-name="T6">document.body.style.overflow = 'auto';</text:span></text:span></text:p>
      <text:p text:style-name="P7"><text:span text:style-name="Source_20_Text"><text:span text:style-name="T7"><text:s text:c="2"/></text:span></text:span><text:span text:style-name="Source_20_Text"><text:span text:style-name="T6">}</text:span></text:span></text:p>
      <text:p text:style-name="P7"><text:span text:style-name="Source_20_Text"><text:span text:style-name="T6">}</text:span></text:span></text:p>
      <text:p text:style-name="P7"/>
      <text:p text:style-name="P6"><text:span text:style-name="Source_20_Text"><text:span text:style-name="T6">// Отправка данных формы на ваш Cloudflare Worker</text:span></text:span></text:p>
      <text:p text:style-name="P6"><text:span text:style-name="Source_20_Text"><text:span text:style-name="T6">async function sendFeedback(event) {</text:span></text:span></text:p>
      <text:p text:style-name="P7"><text:span text:style-name="Source_20_Text"><text:span text:style-name="T7"><text:s text:c="2"/></text:span></text:span><text:span text:style-name="Source_20_Text"><text:span text:style-name="T6">event.preventDefault();</text:span></text:span></text:p>
      <text:p text:style-name="P6"><text:span text:style-name="Source_20_Text"><text:span text:style-name="T7"><text:s text:c="2"/></text:span></text:span><text:span text:style-name="Source_20_Text"><text:span text:style-name="T6">const form = event.target;</text:span></text:span></text:p>
      <text:p text:style-name="P6"><text:span text:style-name="Source_20_Text"><text:span text:style-name="T7"><text:s text:c="2"/></text:span></text:span><text:span text:style-name="Source_20_Text"><text:span text:style-name="T6">const submitBtn = document.getElementById('feedback-submit-btn');</text:span></text:span></text:p>
      <text:p text:style-name="P6"><text:span text:style-name="Source_20_Text"><text:span text:style-name="T7"><text:s text:c="2"/></text:span></text:span><text:span text:style-name="Source_20_Text"><text:span text:style-name="T6">const originalText = submitBtn.textContent;</text:span></text:span></text:p>
      <text:p text:style-name="P7"/>
      <text:p text:style-name="P6"><text:span text:style-name="Source_20_Text"><text:span text:style-name="T7"><text:s text:c="2"/></text:span></text:span><text:span text:style-name="Source_20_Text"><text:span text:style-name="T6">submitBtn.textContent = "Отправка...";</text:span></text:span></text:p>
      <text:p text:style-name="P6"><text:span text:style-name="Source_20_Text"><text:span text:style-name="T7"><text:s text:c="2"/></text:span></text:span><text:span text:style-name="Source_20_Text"><text:span text:style-name="T6">submitBtn.style.pointerEvents = "none";</text:span></text:span></text:p>
      <text:p text:style-name="P7"/>
      <text:p text:style-name="P6"><text:span text:style-name="Source_20_Text"><text:span text:style-name="T7"><text:s text:c="2"/></text:span></text:span><text:span text:style-name="Source_20_Text"><text:span text:style-name="T6">const formData = new FormData(form);</text:span></text:span></text:p>
      <text:p text:style-name="P6"><text:span text:style-name="Source_20_Text"><text:span text:style-name="T7"><text:s text:c="2"/></text:span></text:span><text:span text:style-name="Source_20_Text"><text:span text:style-name="T6">const payload = {</text:span></text:span></text:p>
      <text:p text:style-name="P6"><text:span text:style-name="Source_20_Text"><text:span text:style-name="T7"><text:s text:c="4"/></text:span></text:span><text:span text:style-name="Source_20_Text"><text:span text:style-name="T6">action: "feedback", // Маркер для воркера, чтобы он отличил форму от создания ссылки Ozon</text:span></text:span></text:p>
      <text:p text:style-name="P6"><text:span text:style-name="Source_20_Text"><text:span text:style-name="T7"><text:s text:c="4"/></text:span></text:span><text:span text:style-name="Source_20_Text"><text:span text:style-name="T6">type: formData.get('type'),</text:span></text:span></text:p>
      <text:p text:style-name="P6"><text:span text:style-name="Source_20_Text"><text:span text:style-name="T7"><text:s text:c="4"/></text:span></text:span><text:span text:style-name="Source_20_Text"><text:span text:style-name="T6">name: formData.get('name'),</text:span></text:span></text:p>
      <text:p text:style-name="P6"><text:span text:style-name="Source_20_Text"><text:span text:style-name="T7"><text:s text:c="4"/></text:span></text:span><text:span text:style-name="Source_20_Text"><text:span text:style-name="T6">contact: formData.get('contact'),</text:span></text:span></text:p>
      <text:p text:style-name="P6"><text:span text:style-name="Source_20_Text"><text:span text:style-name="T7"><text:s text:c="4"/></text:span></text:span><text:span text:style-name="Source_20_Text"><text:span text:style-name="T6">orderNumber: formData.get('order_number') || 'Не указан',</text:span></text:span></text:p>
      <text:p text:style-name="P6"><text:span text:style-name="Source_20_Text"><text:span text:style-name="T7"><text:s text:c="4"/></text:span></text:span><text:span text:style-name="Source_20_Text"><text:span text:style-name="T6">message: formData.get('message')</text:span></text:span></text:p>
      <text:p text:style-name="P7"><text:span text:style-name="Source_20_Text"><text:span text:style-name="T7"><text:s text:c="2"/></text:span></text:span><text:span text:style-name="Source_20_Text"><text:span text:style-name="T6">};</text:span></text:span></text:p>
      <text:p text:style-name="P7"/>
      <text:p text:style-name="P6"><text:span text:style-name="Source_20_Text"><text:span text:style-name="T7"><text:s text:c="2"/></text:span></text:span><text:span text:style-name="Source_20_Text"><text:span text:style-name="T6">try {</text:span></text:span></text:p>
      <text:p text:style-name="P6"><text:span text:style-name="Source_20_Text"><text:span text:style-name="T7"><text:s text:c="4"/></text:span></text:span><text:span text:style-name="Source_20_Text"><text:span text:style-name="T6">const response = await fetch(WORKER_URL, {</text:span></text:span></text:p>
      <text:p text:style-name="P6"><text:span text:style-name="Source_20_Text"><text:span text:style-name="T7"><text:s text:c="6"/></text:span></text:span><text:span text:style-name="Source_20_Text"><text:span text:style-name="T6">method: 'POST',</text:span></text:span></text:p>
      <text:p text:style-name="P6"><text:span text:style-name="Source_20_Text"><text:span text:style-name="T7"><text:s text:c="6"/></text:span></text:span><text:span text:style-name="Source_20_Text"><text:span text:style-name="T6">headers: { 'Content-Type': 'application/json' },</text:span></text:span></text:p>
      <text:p text:style-name="P6"><text:span text:style-name="Source_20_Text"><text:span text:style-name="T7"><text:s text:c="6"/></text:span></text:span><text:span text:style-name="Source_20_Text"><text:span text:style-name="T6">body: JSON.stringify(payload)</text:span></text:span></text:p>
      <text:p text:style-name="P7"><text:span text:style-name="Source_20_Text"><text:span text:style-name="T7"><text:s text:c="4"/></text:span></text:span><text:span text:style-name="Source_20_Text"><text:span text:style-name="T6">});</text:span></text:span></text:p>
      <text:p text:style-name="P7"/>
      <text:p text:style-name="P6"><text:span text:style-name="Source_20_Text"><text:span text:style-name="T7"><text:s text:c="4"/></text:span></text:span><text:span text:style-name="Source_20_Text"><text:span text:style-name="T6">if (response.ok) {</text:span></text:span></text:p>
      <text:p text:style-name="P6"><text:span text:style-name="Source_20_Text"><text:span text:style-name="T7"><text:s text:c="6"/></text:span></text:span><text:span text:style-name="Source_20_Text"><text:span text:style-name="T6">alert('Спасибо! Ваш запрос успешно отправлен. Мы свяжемся с вами в ближайшее время.');</text:span></text:span></text:p>
      <text:p text:style-name="P7"><text:span text:style-name="Source_20_Text"><text:span text:style-name="T7"><text:s text:c="6"/></text:span></text:span><text:span text:style-name="Source_20_Text"><text:span text:style-name="T6">closeFeedbackModal();</text:span></text:span></text:p>
      <text:p text:style-name="P6"><text:span text:style-name="Source_20_Text"><text:span text:style-name="T7"><text:s text:c="4"/></text:span></text:span><text:span text:style-name="Source_20_Text"><text:span text:style-name="T6">} else {</text:span></text:span></text:p>
      <text:p text:style-name="P6"><text:span text:style-name="Source_20_Text"><text:span text:style-name="T7"><text:s text:c="6"/></text:span></text:span><text:span text:style-name="Source_20_Text"><text:span text:style-name="T6">alert('Произошла ошибка при отправке. Пожалуйста, попробуйте еще раз.');</text:span></text:span></text:p>
      <text:p text:style-name="P7"><text:span text:style-name="Source_20_Text"><text:span text:style-name="T7"><text:s text:c="4"/></text:span></text:span><text:span text:style-name="Source_20_Text"><text:span text:style-name="T6">}</text:span></text:span></text:p>
      <text:p text:style-name="P6"><text:span text:style-name="Source_20_Text"><text:span text:style-name="T7"><text:s text:c="2"/></text:span></text:span><text:span text:style-name="Source_20_Text"><text:span text:style-name="T6">} catch (error) {</text:span></text:span></text:p>
      <text:p text:style-name="P6"><text:span text:style-name="Source_20_Text"><text:span text:style-name="T7"><text:s text:c="4"/></text:span></text:span><text:span text:style-name="Source_20_Text"><text:span text:style-name="T6">alert('Ошибка сети. Проверьте соединение.');</text:span></text:span></text:p>
      <text:p text:style-name="P7"><text:span text:style-name="Source_20_Text"><text:span text:style-name="T7"><text:s text:c="4"/></text:span></text:span><text:span text:style-name="Source_20_Text"><text:span text:style-name="T6">console.error(error);</text:span></text:span></text:p>
      <text:p text:style-name="P6"><text:span text:style-name="Source_20_Text"><text:span text:style-name="T7"><text:s text:c="2"/></text:span></text:span><text:span text:style-name="Source_20_Text"><text:span text:style-name="T6">} finally {</text:span></text:span></text:p>
      <text:p text:style-name="P7"><text:span text:style-name="Source_20_Text"><text:span text:style-name="T7"><text:s text:c="4"/></text:span></text:span><text:span text:style-name="Source_20_Text"><text:span text:style-name="T6">submitBtn.textContent = originalText;</text:span></text:span></text:p>
      <text:p text:style-name="P6"><text:span text:style-name="Source_20_Text"><text:span text:style-name="T7"><text:s text:c="4"/></text:span></text:span><text:span text:style-name="Source_20_Text"><text:span text:style-name="T6">submitBtn.style.pointerEvents = "auto";</text:span></text:span></text:p>
      <text:p text:style-name="P7"><text:soft-page-break/><text:span text:style-name="Source_20_Text"><text:span text:style-name="T7"><text:s text:c="2"/></text:span></text:span><text:span text:style-name="Source_20_Text"><text:span text:style-name="T6">}</text:span></text:span></text:p>
      <text:p text:style-name="P7"><text:span text:style-name="Source_20_Text"><text:span text:style-name="T6">}</text:span></text:span></text:p>
      <text:p text:style-name="P8">Use code with caution.</text:p>
      <text:p text:style-name="P3"/>
      <text:p text:style-name="P5">Шаг 3. Добавьте разветвление в ваш Cloudflare Worker</text:p>
      <text:p text:style-name="P4"><text:span text:style-name="T1">Поскольку теперь на один и тот же будут приходить два разных типа запросов (создание платежа в Ozon и обычная форма обратной связи), ваш Worker должен уметь их разделять.</text:span><text:span text:style-name="Source_20_Text"><text:span text:style-name="T5">WORKER_URL</text:span></text:span></text:p>
      <text:p text:style-name="P4"><text:span text:style-name="T1">Добавьте простую проверку в самое начало вашего блока внутри Cloudflare Worker:</text:span><text:span text:style-name="Source_20_Text"><text:span text:style-name="T5">try</text:span></text:span></text:p>
      <text:p text:style-name="P5">JavaScript</text:p>
      <text:p text:style-name="P6"><text:span text:style-name="Source_20_Text"><text:span text:style-name="T7"><text:s text:c="4"/></text:span></text:span><text:span text:style-name="Source_20_Text"><text:span text:style-name="T6">try {</text:span></text:span></text:p>
      <text:p text:style-name="P6"><text:span text:style-name="Source_20_Text"><text:span text:style-name="T7"><text:s text:c="6"/></text:span></text:span><text:span text:style-name="Source_20_Text"><text:span text:style-name="T6">const clientData = await request.json();</text:span></text:span></text:p>
      <text:p text:style-name="P7"/>
      <text:p text:style-name="P6"><text:span text:style-name="Source_20_Text"><text:span text:style-name="T7"><text:s text:c="6"/></text:span></text:span><text:span text:style-name="Source_20_Text"><text:span text:style-name="T6">// [НОВОЕ]: Если пришла форма обратной связи</text:span></text:span></text:p>
      <text:p text:style-name="P6"><text:span text:style-name="Source_20_Text"><text:span text:style-name="T7"><text:s text:c="6"/></text:span></text:span><text:span text:style-name="Source_20_Text"><text:span text:style-name="T6">if (clientData.action === "feedback") {</text:span></text:span></text:p>
      <text:p text:style-name="P7"><text:span text:style-name="Source_20_Text"><text:span text:style-name="T7"><text:s text:c="8"/></text:span></text:span></text:p>
      <text:p text:style-name="P6"><text:span text:style-name="Source_20_Text"><text:span text:style-name="T7"><text:s text:c="8"/></text:span></text:span><text:span text:style-name="Source_20_Text"><text:span text:style-name="T6">// Тут вы можете настроить отправку сообщения в Telegram или на Email.</text:span></text:span></text:p>
      <text:p text:style-name="P6"><text:span text:style-name="Source_20_Text"><text:span text:style-name="T7"><text:s text:c="8"/></text:span></text:span><text:span text:style-name="Source_20_Text"><text:span text:style-name="T6">// Для быстрого теста просто логируем данные в консоль Cloudflare и возвращаем Успех:</text:span></text:span></text:p>
      <text:p text:style-name="P6"><text:span text:style-name="Source_20_Text"><text:span text:style-name="T7"><text:s text:c="8"/></text:span></text:span><text:span text:style-name="Source_20_Text"><text:span text:style-name="T6">console.log("Получена заявка с сайта:", clientData);</text:span></text:span></text:p>
      <text:p text:style-name="P7"/>
      <text:p text:style-name="P6"><text:span text:style-name="Source_20_Text"><text:span text:style-name="T7"><text:s text:c="8"/></text:span></text:span><text:span text:style-name="Source_20_Text"><text:span text:style-name="T6">return new Response(JSON.stringify({ status: "success", message: "Feedback received" }), {</text:span></text:span></text:p>
      <text:p text:style-name="P6"><text:span text:style-name="Source_20_Text"><text:span text:style-name="T7"><text:s text:c="10"/></text:span></text:span><text:span text:style-name="Source_20_Text"><text:span text:style-name="T6">status: 200,</text:span></text:span></text:p>
      <text:p text:style-name="P6"><text:span text:style-name="Source_20_Text"><text:span text:style-name="T7"><text:s text:c="10"/></text:span></text:span><text:span text:style-name="Source_20_Text"><text:span text:style-name="T6">headers: corsHeaders</text:span></text:span></text:p>
      <text:p text:style-name="P7"><text:span text:style-name="Source_20_Text"><text:span text:style-name="T7"><text:s text:c="8"/></text:span></text:span><text:span text:style-name="Source_20_Text"><text:span text:style-name="T6">});</text:span></text:span></text:p>
      <text:p text:style-name="P7"><text:span text:style-name="Source_20_Text"><text:span text:style-name="T7"><text:s text:c="6"/></text:span></text:span><text:span text:style-name="Source_20_Text"><text:span text:style-name="T6">}</text:span></text:span></text:p>
      <text:p text:style-name="P7"/>
      <text:p text:style-name="P6"><text:span text:style-name="Source_20_Text"><text:span text:style-name="T7"><text:s text:c="6"/></text:span></text:span><text:span text:style-name="Source_20_Text"><text:span text:style-name="T6">// --- ДАЛЬШЕ ИДЕТ ВАШ СТАРЫЙ НЕИЗМЕННЫЙ КОД ОЗОН ПЛАТЕЖЕЙ ---</text:span></text:span></text:p>
      <text:p text:style-name="P6"><text:span text:style-name="Source_20_Text"><text:span text:style-name="T7"><text:s text:c="6"/></text:span></text:span><text:span text:style-name="Source_20_Text"><text:span text:style-name="T6">const ACCESS_KEY = (env.OZON_ACCESS_KEY || '1b34...').trim();</text:span></text:span></text:p>
      <text:p text:style-name="P6"><text:span text:style-name="Source_20_Text"><text:span text:style-name="T7"><text:s text:c="6"/></text:span></text:span><text:span text:style-name="Source_20_Text"><text:span text:style-name="T6">// ... и так далее ...</text:span></text:span></text:p>
      <text:p text:style-name="P8">Use code with caution.</text:p>
      <text:p text:style-name="P3"/>
      <text:p text:style-name="P9">📲 <text:span text:style-name="T8">Как рационально получать эти уведомления?</text:span></text:p>
      <text:p text:style-name="P4"><text:span text:style-name="T1">Когда клиент заполнит форму (например, выберет «Заявка на возврат», укажет телефон и причину), данные прилетят в Worker. Самый рациональный способ не пропустить её — настроить бесплатную </text:span><text:span text:style-name="Strong_20_Emphasis"><text:span text:style-name="T2">отправку уведомлений в ваш Telegram</text:span></text:span><text:span text:style-name="T1">. Воркер сможет делать секундный скрытый subrequest к API Телеграма и присылать вам сообщение вида:</text:span></text:p>
      <text:p text:style-name="P10"><text:span text:style-name="T7">🔔 </text:span><text:span text:style-name="Strong_20_Emphasis"><text:span text:style-name="T2">Новая заявка на возврат!</text:span></text:span><text:span text:style-name="T1"><text:line-break/>👤 Имя: Иван<text:line-break/>📞 Контакт: @ivan_puzzler<text:line-break/>📦 Номер заказа: AKTIFY-1719830<text:line-break/>📝 Причина: Не смог собрать головоломку за три дня, хочу вернуть.</text:span></text:p>
      <text:p text:style-name="P4"><text:span text:style-name="T1">Форма готова к тестированию. Если вы хотите, чтобы заявки мгновенно приходили к вам в </text:span><text:span text:style-name="Strong_20_Emphasis"><text:span text:style-name="T2">Telegram-чат</text:span></text:span><text:span text:style-name="T1"> или группу, напишите. Я пришлю </text:span><text:span text:style-name="Strong_20_Emphasis"><text:span text:style-name="T2">3 строчки кода для воркера</text:span></text:span><text:span text:style-name="T1">, которые подключат бесплатного Telegram-бота для уведомлений. У вас уже создан свой Telegram-бот или подсказать, как сделать его за 1 минуту?</text:span></text:p>
      <text:section text:style-name="Sect1" text:name="shrproxy215">
        <text:p text:style-name="P4"/>
      </text:section>
      <text:section text:style-name="Sect1" text:name="fbproxy216">
        <text:p text:style-name="P4"/>
      </text:section>
      <text:p text:style-name="Standard"/>
      <text:section text:style-name="Sect1" text:name="main">
        <text:section text:style-name="Sect1" text:name="cnt">
          <text:p text:style-name="P11"><text:soft-page-break/></text:p>
          <text:section text:style-name="Sect1" text:name="_gTtNauj8LrDgkPIP2M7b4As_3">
            <text:p text:style-name="P2">Создать Telegram-бота и настроить уведомления можно буквально за 2 минуты. Это абсолютно бесплатно, а сообщения о вопросах, отзывах или возвратах будут приходить к вам на телефон мгновенно.</text:p>
            <text:p text:style-name="P2">Вот простая пошаговая инструкция, как сделать бота и подключить его к вашему сайту.</text:p>
            <text:p text:style-name="P12"/>
            <text:p text:style-name="P5">Шаг 1. Создайте своего Telegram-бота (за 1 минуту)</text:p>
            <text:list text:style-name="L1">
              <text:list-item>
                <text:p text:style-name="P13"><text:span text:style-name="T1">Откройте Telegram и введите в поиске </text:span><text:span text:style-name="Strong_20_Emphasis"><text:span text:style-name="Source_20_Text"><text:span text:style-name="T4">@BotFather</text:span></text:span></text:span><text:span text:style-name="T1"> (это официальный бот Павла Дурова для создания других ботов. Возле его имени должна быть синяя галочка).</text:span></text:p>
              </text:list-item>
              <text:list-item>
                <text:p text:style-name="P13"><text:span text:style-name="T1">Нажмите кнопку </text:span><text:span text:style-name="Strong_20_Emphasis"><text:span text:style-name="T2">Start</text:span></text:span><text:span text:style-name="T1"> (или отправьте команду ).</text:span><text:span text:style-name="Source_20_Text"><text:span text:style-name="T5">/newbot</text:span></text:span></text:p>
              </text:list-item>
              <text:list-item>
                <text:p text:style-name="P13"><text:span text:style-name="T1">Бот попросит ввести имя для вашего нового бота (любое понятное вам, например: ).</text:span><text:span text:style-name="Source_20_Text"><text:span text:style-name="T5">Aktify Магазин Уведомления</text:span></text:span></text:p>
              </text:list-item>
              <text:list-item>
                <text:p text:style-name="P13"><text:span text:style-name="T1">Затем бот попросит ввести системное имя (), которое обязательно должно заканчиваться на (например: ).</text:span><text:span text:style-name="T9">Aktify</text:span><text:span text:style-name="Source_20_Text"><text:span text:style-name="T5">_bot</text:span></text:span></text:p>
              </text:list-item>
              <text:list-item>
                <text:p text:style-name="P13"><text:span text:style-name="T1">В ответ пришлет вам </text:span><text:span text:style-name="Source_20_Text"><text:span text:style-name="T5">@BotFather</text:span></text:span><text:span text:style-name="Strong_20_Emphasis"><text:span text:style-name="T2">HTTP API Токен</text:span></text:span><text:span text:style-name="T1"> (длинная строчка из букв и цифр, например: ). </text:span><text:span text:style-name="Source_20_Text"><text:span text:style-name="T5">7123456789:ABCdefGhIJK...</text:span></text:span><text:span text:style-name="Strong_20_Emphasis"><text:span text:style-name="T2">Скопируйте этот токен</text:span></text:span><text:span text:style-name="T1">, он понадобится для Воркера.</text:span></text:p>
              </text:list-item>
            </text:list>
            <text:p text:style-name="P12"/>
            <text:p text:style-name="P4"><text:span text:style-name="T3">Шаг 2. Узнайте свой личный ID чата (</text:span><text:span text:style-name="Source_20_Text"><text:span text:style-name="T4">Chat ID</text:span></text:span><text:span text:style-name="T3">)</text:span></text:p>
            <text:p text:style-name="P14">Чтобы бот знал, кому именно в Telegram нужно отправлять уведомления, ему нужен ваш ID аккаунта.</text:p>
            <text:list text:style-name="L2">
              <text:list-item>
                <text:p text:style-name="P15"><text:span text:style-name="T1">Введите в поиске Telegram .</text:span><text:span text:style-name="Strong_20_Emphasis"><text:span text:style-name="Source_20_Text"><text:span text:style-name="T4">@userinfobot</text:span></text:span></text:span></text:p>
              </text:list-item>
              <text:list-item>
                <text:p text:style-name="P15"><text:span text:style-name="T1">Нажмите кнопку .</text:span><text:span text:style-name="Strong_20_Emphasis"><text:span text:style-name="T2">Start</text:span></text:span></text:p>
              </text:list-item>
              <text:list-item>
                <text:p text:style-name="P15"><text:span text:style-name="T1">Бот мгновенно пришлет сообщение, где в строке будет ваш цифровой номер (например: ). </text:span><text:span text:style-name="Source_20_Text"><text:span text:style-name="T5">Id:456789123</text:span></text:span><text:span text:style-name="Strong_20_Emphasis"><text:span text:style-name="T2">Скопируйте этот номер</text:span></text:span><text:span text:style-name="T1">.</text:span></text:p>
              </text:list-item>
              <text:list-item>
                <text:p text:style-name="P15"><text:span text:style-name="Strong_20_Emphasis"><text:span text:style-name="T2">Важно:</text:span></text:span><text:span text:style-name="T1"> Откройте диалог с вашим созданным ботом (ссылка на него будет в сообщении от BotFather) и нажмите кнопку </text:span><text:span text:style-name="Strong_20_Emphasis"><text:span text:style-name="T2">Start</text:span></text:span><text:span text:style-name="T1">, чтобы разрешить ему писать вам сообщения.</text:span></text:p>
              </text:list-item>
            </text:list>
            <text:p text:style-name="P12"/>
            <text:p text:style-name="P5">Шаг 3. Добавьте код отправки в ваш Cloudflare Worker</text:p>
            <text:p text:style-name="P4"><text:span text:style-name="T1">Теперь вернитесь к коду вашего Cloudflare Worker. Найдите блок обработки формы обратной связи , который мы добавили на прошлом шаге, и обновите его, вставив вызов Telegram API.</text:span><text:span text:style-name="Source_20_Text"><text:span text:style-name="T5">if (clientData.action === "feedback")</text:span></text:span></text:p>
            <text:p text:style-name="P4"><text:span text:style-name="Strong_20_Emphasis"><text:span text:style-name="T2">Замените этот блок на следующий рабочий код:</text:span></text:span></text:p>
            <text:p text:style-name="P5">JavaScript</text:p>
            <text:p text:style-name="P6"><text:span text:style-name="Source_20_Text"><text:span text:style-name="T7"><text:s text:c="4"/></text:span></text:span><text:span text:style-name="Source_20_Text"><text:span text:style-name="T6">try {</text:span></text:span></text:p>
            <text:p text:style-name="P6"><text:span text:style-name="Source_20_Text"><text:span text:style-name="T7"><text:s text:c="6"/></text:span></text:span><text:span text:style-name="Source_20_Text"><text:span text:style-name="T6">const clientData = await request.json();</text:span></text:span></text:p>
            <text:p text:style-name="P16"/>
            <text:p text:style-name="P16"><text:span text:style-name="Source_20_Text"><text:span text:style-name="T7"><text:s text:c="6"/></text:span></text:span></text:p>
            <text:p text:style-name="P6"><text:span text:style-name="Source_20_Text"><text:span text:style-name="T6">// [ОБНОВЛЕНО]: Если пришла форма обратной связи — отправляем в Telegram</text:span></text:span></text:p>
            <text:p text:style-name="P6"><text:span text:style-name="Source_20_Text"><text:span text:style-name="T7"><text:s text:c="6"/></text:span></text:span><text:span text:style-name="Source_20_Text"><text:span text:style-name="T6">if (clientData.action === "feedback") {</text:span></text:span></text:p>
            <text:p text:style-name="P16"><text:span text:style-name="Source_20_Text"><text:span text:style-name="T7"><text:s text:c="8"/></text:span></text:span></text:p>
            <text:p text:style-name="P6"><text:span text:style-name="Source_20_Text"><text:span text:style-name="T7"><text:s text:c="8"/></text:span></text:span><text:span text:style-name="Source_20_Text"><text:span text:style-name="T6">// 1. ВСТАВЬТЕ СЮДА ВАШИ ДАННЫЕ ИЗ ШАГОВ 1 И 2</text:span></text:span></text:p>
            <text:p text:style-name="P6"><text:span text:style-name="Source_20_Text"><text:span text:style-name="T7"><text:s text:c="8"/></text:span></text:span><text:span text:style-name="Source_20_Text"><text:span text:style-name="T6">// (Для безопасности их лучше вынести в Variables панели Cloudflare как env.TG_TOKEN и env.TG_CHAT_ID)</text:span></text:span></text:p>
            <text:p text:style-name="P6"><text:span text:style-name="Source_20_Text"><text:span text:style-name="T7"><text:s text:c="8"/></text:span></text:span><text:span text:style-name="Source_20_Text"><text:span text:style-name="T6">const TG_TOKEN = "СЮДА_ВСТАВЬТЕ_ТОКЕН_ОТ_BOTFATHER";</text:span></text:span></text:p>
            <text:p text:style-name="P6"><text:span text:style-name="Source_20_Text"><text:span text:style-name="T7"><text:s text:c="8"/></text:span></text:span><text:span text:style-name="Source_20_Text"><text:span text:style-name="T6">const TG_CHAT_ID = "СЮДА_ВСТАВЬТЕ_ВАШ_ID_ОТ_USERINFOBOT";</text:span></text:span></text:p>
            <text:p text:style-name="P16"/>
            <text:p text:style-name="P6"><text:soft-page-break/><text:span text:style-name="Source_20_Text"><text:span text:style-name="T7"><text:s text:c="8"/></text:span></text:span><text:span text:style-name="Source_20_Text"><text:span text:style-name="T6">// Разные иконки для типов заявок</text:span></text:span></text:p>
            <text:p text:style-name="P6"><text:span text:style-name="Source_20_Text"><text:span text:style-name="T7"><text:s text:c="8"/></text:span></text:span><text:span text:style-name="Source_20_Text"><text:span text:style-name="T6">let emoji = "❓";</text:span></text:span></text:p>
            <text:p text:style-name="P6"><text:span text:style-name="Source_20_Text"><text:span text:style-name="T7"><text:s text:c="8"/></text:span></text:span><text:span text:style-name="Source_20_Text"><text:span text:style-name="T6">if (clientData.type === "review") emoji = "⭐️";</text:span></text:span></text:p>
            <text:p text:style-name="P6"><text:span text:style-name="Source_20_Text"><text:span text:style-name="T7"><text:s text:c="8"/></text:span></text:span><text:span text:style-name="Source_20_Text"><text:span text:style-name="T6">if (clientData.type === "return") emoji = "📦";</text:span></text:span></text:p>
            <text:p text:style-name="P16"/>
            <text:p text:style-name="P6"><text:span text:style-name="Source_20_Text"><text:span text:style-name="T7"><text:s text:c="8"/></text:span></text:span><text:span text:style-name="Source_20_Text"><text:span text:style-name="T6">// Формируем красивый текст сообщения</text:span></text:span></text:p>
            <text:p text:style-name="P6"><text:span text:style-name="Source_20_Text"><text:span text:style-name="T7"><text:s text:c="8"/></text:span></text:span><text:span text:style-name="Source_20_Text"><text:span text:style-name="T6">const messageText = </text:span></text:span></text:p>
            <text:p text:style-name="P6"><text:span text:style-name="Source_20_Text"><text:span text:style-name="T7"><text:s text:c="10"/></text:span></text:span><text:span text:style-name="Source_20_Text"><text:span text:style-name="T6">`${emoji} *Новая заявка с сайта Aktify!*\n\n` +</text:span></text:span></text:p>
            <text:p text:style-name="P6"><text:span text:style-name="Source_20_Text"><text:span text:style-name="T7"><text:s text:c="10"/></text:span></text:span><text:span text:style-name="Source_20_Text"><text:span text:style-name="T6">`• *Тип:* ${clientData.type === "question" ? "Вопрос" : clientData.type === "review" ? "Отзыв" : "Возврат"}\n` +</text:span></text:span></text:p>
            <text:p text:style-name="P6"><text:span text:style-name="Source_20_Text"><text:span text:style-name="T7"><text:s text:c="10"/></text:span></text:span><text:span text:style-name="Source_20_Text"><text:span text:style-name="T6">`• *Имя:* ${clientData.name}\n` +</text:span></text:span></text:p>
            <text:p text:style-name="P6"><text:span text:style-name="Source_20_Text"><text:span text:style-name="T7"><text:s text:c="10"/></text:span></text:span><text:span text:style-name="Source_20_Text"><text:span text:style-name="T6">`• *Контакты:* ${clientData.contact}\n` +</text:span></text:span></text:p>
            <text:p text:style-name="P6"><text:span text:style-name="Source_20_Text"><text:span text:style-name="T7"><text:s text:c="10"/></text:span></text:span><text:span text:style-name="Source_20_Text"><text:span text:style-name="T6">`• *Номер заказа:* ${clientData.orderNumber}\n\n` +</text:span></text:span></text:p>
            <text:p text:style-name="P6"><text:span text:style-name="Source_20_Text"><text:span text:style-name="T7"><text:s text:c="10"/></text:span></text:span><text:span text:style-name="Source_20_Text"><text:span text:style-name="T6">`• *Сообщение:* \n_${clientData.message}_`;</text:span></text:span></text:p>
            <text:p text:style-name="P16"/>
            <text:p text:style-name="P6"><text:span text:style-name="Source_20_Text"><text:span text:style-name="T7"><text:s text:c="8"/></text:span></text:span><text:span text:style-name="Source_20_Text"><text:span text:style-name="T6">// Отправляем HTTP-запрос в Telegram API напрямую через Cloudflare</text:span></text:span></text:p>
            <text:p text:style-name="P6"><text:span text:style-name="Source_20_Text"><text:span text:style-name="T7"><text:s text:c="8"/></text:span></text:span><text:span text:style-name="Source_20_Text"><text:span text:style-name="T6">const tgResponse = await fetch(`https://telegram.org{TG_TOKEN}/sendMessage`, {</text:span></text:span></text:p>
            <text:p text:style-name="P6"><text:span text:style-name="Source_20_Text"><text:span text:style-name="T7"><text:s text:c="10"/></text:span></text:span><text:span text:style-name="Source_20_Text"><text:span text:style-name="T6">method: "POST",</text:span></text:span></text:p>
            <text:p text:style-name="P6"><text:span text:style-name="Source_20_Text"><text:span text:style-name="T7"><text:s text:c="10"/></text:span></text:span><text:span text:style-name="Source_20_Text"><text:span text:style-name="T6">headers: { "Content-Type": "application/json" },</text:span></text:span></text:p>
            <text:p text:style-name="P16"><text:span text:style-name="Source_20_Text"><text:span text:style-name="T7"><text:s text:c="10"/></text:span></text:span><text:span text:style-name="Source_20_Text"><text:span text:style-name="T6">body: JSON.stringify({</text:span></text:span></text:p>
            <text:p text:style-name="P16"><text:span text:style-name="Source_20_Text"><text:span text:style-name="T7"><text:s text:c="12"/></text:span></text:span><text:span text:style-name="Source_20_Text"><text:span text:style-name="T6">chat_id: TG_CHAT_ID,</text:span></text:span></text:p>
            <text:p text:style-name="P16"><text:span text:style-name="Source_20_Text"><text:span text:style-name="T7"><text:s text:c="12"/></text:span></text:span><text:span text:style-name="Source_20_Text"><text:span text:style-name="T6">text: messageText,</text:span></text:span></text:p>
            <text:p text:style-name="P6"><text:span text:style-name="Source_20_Text"><text:span text:style-name="T7"><text:s text:c="12"/></text:span></text:span><text:span text:style-name="Source_20_Text"><text:span text:style-name="T6">parse_mode: "Markdown" // Позволяет делать текст жирным или курсивом</text:span></text:span></text:p>
            <text:p text:style-name="P16"><text:span text:style-name="Source_20_Text"><text:span text:style-name="T7"><text:s text:c="10"/></text:span></text:span><text:span text:style-name="Source_20_Text"><text:span text:style-name="T6">})</text:span></text:span></text:p>
            <text:p text:style-name="P16"><text:span text:style-name="Source_20_Text"><text:span text:style-name="T7"><text:s text:c="8"/></text:span></text:span><text:span text:style-name="Source_20_Text"><text:span text:style-name="T6">});</text:span></text:span></text:p>
            <text:p text:style-name="P16"/>
            <text:p text:style-name="P6"><text:span text:style-name="Source_20_Text"><text:span text:style-name="T7"><text:s text:c="8"/></text:span></text:span><text:span text:style-name="Source_20_Text"><text:span text:style-name="T6">const tgResult = await tgResponse.json();</text:span></text:span></text:p>
            <text:p text:style-name="P16"/>
            <text:p text:style-name="P6"><text:span text:style-name="Source_20_Text"><text:span text:style-name="T7"><text:s text:c="8"/></text:span></text:span><text:span text:style-name="Source_20_Text"><text:span text:style-name="T6">if (!tgResponse.ok) {</text:span></text:span></text:p>
            <text:p text:style-name="P6"><text:span text:style-name="Source_20_Text"><text:span text:style-name="T7"><text:s text:c="10"/></text:span></text:span><text:span text:style-name="Source_20_Text"><text:span text:style-name="T6">console.error("Ошибка Telegram API:", tgResult);</text:span></text:span></text:p>
            <text:p text:style-name="P6"><text:span text:style-name="Source_20_Text"><text:span text:style-name="T7"><text:s text:c="10"/></text:span></text:span><text:span text:style-name="Source_20_Text"><text:span text:style-name="T6">return new Response(JSON.stringify({ error: "Telegram delivery failed" }), { status: 500, headers: corsHeaders });</text:span></text:span></text:p>
            <text:p text:style-name="P16"><text:span text:style-name="Source_20_Text"><text:span text:style-name="T7"><text:s text:c="8"/></text:span></text:span><text:span text:style-name="Source_20_Text"><text:span text:style-name="T6">}</text:span></text:span></text:p>
            <text:p text:style-name="P16"/>
            <text:p text:style-name="P6"><text:span text:style-name="Source_20_Text"><text:span text:style-name="T7"><text:s text:c="8"/></text:span></text:span><text:span text:style-name="Source_20_Text"><text:span text:style-name="T6">return new Response(JSON.stringify({ status: "success", message: "Уведомление в Telegram отправлено" }), {</text:span></text:span></text:p>
            <text:p text:style-name="P6"><text:span text:style-name="Source_20_Text"><text:span text:style-name="T7"><text:s text:c="10"/></text:span></text:span><text:span text:style-name="Source_20_Text"><text:span text:style-name="T6">status: 200,</text:span></text:span></text:p>
            <text:p text:style-name="P6"><text:span text:style-name="Source_20_Text"><text:span text:style-name="T7"><text:s text:c="10"/></text:span></text:span><text:span text:style-name="Source_20_Text"><text:span text:style-name="T6">headers: corsHeaders</text:span></text:span></text:p>
            <text:p text:style-name="P16"><text:span text:style-name="Source_20_Text"><text:span text:style-name="T7"><text:s text:c="8"/></text:span></text:span><text:span text:style-name="Source_20_Text"><text:span text:style-name="T6">});</text:span></text:span></text:p>
            <text:p text:style-name="P16"><text:span text:style-name="Source_20_Text"><text:span text:style-name="T7"><text:s text:c="6"/></text:span></text:span><text:span text:style-name="Source_20_Text"><text:span text:style-name="T6">}</text:span></text:span></text:p>
            <text:p text:style-name="P16"/>
            <text:p text:style-name="P6"><text:span text:style-name="Source_20_Text"><text:span text:style-name="T7"><text:s text:c="6"/></text:span></text:span><text:span text:style-name="Source_20_Text"><text:span text:style-name="T6">// --- ДАЛЬШЕ ИДЕТ ВАШ СТАРЫЙ КОД ОЗОН ПЛАТЕЖЕЙ (НЕ ТРОГАЕМ) ---</text:span></text:span></text:p>
            <text:p text:style-name="P6"><text:span text:style-name="Source_20_Text"><text:span text:style-name="T7"><text:s text:c="6"/></text:span></text:span><text:span text:style-name="Source_20_Text"><text:span text:style-name="T6">const ACCESS_KEY = (env.OZON_ACCESS_KEY || '1b34...').trim();</text:span></text:span></text:p>
            <text:p text:style-name="P6"><text:span text:style-name="Source_20_Text"><text:span text:style-name="T7"><text:s text:c="6"/></text:span></text:span><text:span text:style-name="Source_20_Text"><text:span text:style-name="T6">// ... и так далее ...</text:span></text:span></text:p>
            <text:p text:style-name="P8">Use code with caution.</text:p>
            <text:p text:style-name="P4"><text:span text:style-name="T1">Нажмите кнопку в Cloudflare.</text:span><text:span text:style-name="Strong_20_Emphasis"><text:span text:style-name="T2">Save and Deploy</text:span></text:span></text:p>
            <text:p text:style-name="P12"/>
            <text:p text:style-name="P5">Как протестировать уведомления?</text:p>
            <text:list text:style-name="L3">
              <text:list-item>
                <text:p text:style-name="P17"><text:span text:style-name="T1">Откройте ваш сайт .</text:span><text:span text:style-name="Source_20_Text"><text:span text:style-name="T5">index.html</text:span></text:span></text:p>
              </text:list-item>
              <text:list-item>
                <text:p text:style-name="P17"><text:span text:style-name="T1">Нажмите внизу сайта кнопку, например, .</text:span><text:span text:style-name="Strong_20_Emphasis"><text:span text:style-name="T2">«Заявка на возврат»</text:span></text:span></text:p>
              </text:list-item>
              <text:list-item>
                <text:p text:style-name="P18">Заполните тестовые поля: Имя, Telegram и укажите причину возврата.</text:p>
              </text:list-item>
              <text:list-item>
                <text:p text:style-name="P17"><text:span text:style-name="T1">Нажмите .</text:span><text:span text:style-name="Strong_20_Emphasis"><text:span text:style-name="T2">Отправить</text:span></text:span></text:p>
              </text:list-item>
              <text:list-item>
                <text:p text:style-name="P17"><text:span text:style-name="T1">На экране появится сообщение «Спасибо! Ваш запрос успешно отправлен», и в эту же секунду ваш личный Telegram-бот </text:span><text:span text:style-name="Strong_20_Emphasis"><text:span text:style-name="T2">пришлет вам на телефон красивое уведомление</text:span></text:span><text:span text:style-name="T1"> со всеми заполненными данными.</text:span></text:p>
              </text:list-item>
            </text:list>
            <text:p text:style-name="P4"><text:soft-page-break/><text:span text:style-name="T1">Если при отправке формы бот ничего не прислал, проверьте, нажали ли вы кнопку </text:span><text:span text:style-name="Strong_20_Emphasis"><text:span text:style-name="T2">Start</text:span></text:span><text:span text:style-name="T1"> внутри самого бота перед тестом (это обязательная защита Telegram от спама). Напишите, получилось ли </text:span><text:span text:style-name="Strong_20_Emphasis"><text:span text:style-name="T2">поймать первое уведомление</text:span></text:span><text:span text:style-name="T1"> на телефоне?</text:span></text:p>
            <text:section text:style-name="Sect1" text:name="shrproxy218">
              <text:p text:style-name="P19"/>
            </text:section>
            <text:section text:style-name="Sect1" text:name="fbproxy219">
              <text:p text:style-name="P19"/>
            </text:section>
            <text:section text:style-name="Sect1" text:name="action-menu-parent-container">
              <text:p text:style-name="P20"/>
            </text:section>
          </text:section>
          <text:section text:style-name="Sect1" text:name="gws-plugins-collections-tray__save-components-async">
            <text:p text:style-name="P21"/>
          </text:section>
          <text:section text:style-name="Sect1" text:name="before-appbar">
            <text:p text:style-name="P21"/>
            <text:section text:style-name="Sect1" text:name="_gTtNauj8LrDgkPIP2M7b4As_10">
              <text:p text:style-name="P21"/>
            </text:section>
          </text:section>
          <text:section text:style-name="Sect1" text:name="_gTtNauj8LrDgkPIP2M7b4As_12">
            <text:p text:style-name="P22"/>
          </text:section>
          <text:section text:style-name="Sect1" text:name="oFNiHe">
            <text:p text:style-name="P22"/>
          </text:section>
          <text:section text:style-name="Sect1" text:name="rcnt">
            <text:p text:style-name="P22"/>
          </text:section>
          <text:section text:style-name="Sect1" text:name="_gTtNauj8LrDgkPIP2M7b4As_14">
            <text:p text:style-name="P22"/>
            <text:section text:style-name="Sect1" text:name="_gTtNauj8LrDgkPIP2M7b4As_16">
              <text:p text:style-name="P21"/>
            </text:section>
            <text:section text:style-name="Sect1" text:name="_gTtNauj8LrDgkPIP2M7b4As_18">
              <text:p text:style-name="P21"/>
            </text:section>
          </text:section>
          <text:section text:style-name="Sect1" text:name="sfooter">
            <text:p text:style-name="P22"/>
          </text:section>
        </text:section>
      </text:section>
      <text:section text:style-name="Sect1" text:name="lfootercc">
        <text:p text:style-name="P11"/>
        <text:section text:style-name="Sect1" text:name="dbg_">
          <text:p text:style-name="P11"/>
        </text:section>
      </text:section>
      <text:section text:style-name="Sect1" text:name="goog-lr-2">
        <text:p text:style-name="P23"/>
      </text:section>
      <text:p text:style-name="P2"><text:span text:style-name="T10">Да, вы можете сделать очень эффективную и простую защиту, которая отсеет 99% автоматических спам-ботов</text:span>. Для этого не нужно подключать тяжелую и неудобную для пользователей Google ReCAPTCHA.</text:p>
      <text:p text:style-name="P1"><text:span text:style-name="T1">Самый рациональный способ — метод .</text:span><text:span text:style-name="Strong_20_Emphasis"><text:span text:style-name="T2">Honeypot («Горшочек с медом»)</text:span></text:span></text:p>
      <text:p text:style-name="P24">Как работает Honeypot?</text:p>
      <text:p text:style-name="P1"><text:span text:style-name="T1">Роботы-спамеры не видят сайт глазами. Они сканируют HTML-код и автоматически заполняют абсолютно все поля , которые находят, после чего отправляют форму.<text:line-break/>Мы создадим </text:span><text:span text:style-name="Source_20_Text"><text:span text:style-name="T5">input</text:span></text:span><text:span text:style-name="Strong_20_Emphasis"><text:span text:style-name="T2">скрытое от людей поле</text:span></text:span><text:span text:style-name="T1">. Обычный человек его не увидит и оставит пустым. А бот обязательно его заполнит. Если поле заполнено — Worker мгновенно блокирует запрос.</text:span></text:p>
      <text:p text:style-name="P3"/>
      <text:p text:style-name="P4"><text:span text:style-name="T3">Шаг 1. Добавьте скрытое поле в HTML (</text:span><text:span text:style-name="Source_20_Text"><text:span text:style-name="T4">index.html</text:span></text:span><text:span text:style-name="T3">)</text:span></text:p>
      <text:p text:style-name="P4"><text:span text:style-name="T1">Найдите вашу форму обратной связи внутри тега и вставьте туда новый (например, сразу под скрытым полем ):</text:span><text:span text:style-name="Source_20_Text"><text:span text:style-name="T5">&lt;dialog id="feedback-modal"&gt;inputtype</text:span></text:span></text:p>
      <text:p text:style-name="P5">html</text:p>
      <text:p text:style-name="P6"><text:span text:style-name="Source_20_Text"><text:span text:style-name="T6">&lt;!-- Скрытое поле для типа заявки (уже есть в коде) --&gt;</text:span></text:span></text:p>
      <text:p text:style-name="P6"><text:span text:style-name="Source_20_Text"><text:span text:style-name="T6">&lt;input type="hidden" id="feedback-type" name="type" value="question" /&gt;</text:span></text:span></text:p>
      <text:p text:style-name="P7"/>
      <text:p text:style-name="P6"><text:span text:style-name="Source_20_Text"><text:span text:style-name="T6">&lt;!-- [НОВОЕ]: Поле-ловушка Honeypot для ботов --&gt;</text:span></text:span></text:p>
      <text:p text:style-name="P6"><text:span text:style-name="Source_20_Text"><text:span text:style-name="T6">&lt;div style="display: none !important; visibility: hidden !important;" aria-hidden="true"&gt;</text:span></text:span></text:p>
      <text:p text:style-name="P6"><text:span text:style-name="Source_20_Text"><text:span text:style-name="T7"><text:s text:c="2"/></text:span></text:span><text:span text:style-name="Source_20_Text"><text:span text:style-name="T6">&lt;input type="text" name="email_confirm" id="feedback-honeypot" autocomplete="off" tabindex="-1" /&gt;</text:span></text:span></text:p>
      <text:p text:style-name="P6"><text:span text:style-name="Source_20_Text"><text:span text:style-name="T6">&lt;/div&gt;</text:span></text:span></text:p>
      <text:p text:style-name="P8">Use code with caution.</text:p>
      <text:p text:style-name="P4"><text:span text:style-name="Emphasis"><text:span text:style-name="T1">Обратите внимание: мы назвали поле . Боты подумают, что это важное поле подтверждения почты, и гарантированно его заполнят. Стили и атрибуты безопасности скрывают его от реальных пользователей.</text:span></text:span><text:span text:style-name="Emphasis"><text:span text:style-name="Source_20_Text"><text:span text:style-name="T5">email_confirmdisplay: none</text:span></text:span></text:span></text:p>
      <text:p text:style-name="P3"/>
      <text:p text:style-name="P4"><text:span text:style-name="T3">Шаг 2. Обновите функцию отправки в </text:span><text:span text:style-name="Source_20_Text"><text:span text:style-name="T4">assets/app.js</text:span></text:span></text:p>
      <text:p text:style-name="P4"><text:span text:style-name="T1">Вам нужно научить JavaScript считывать значение из ловушки. Найдите функцию и добавьте туда чтение поля :</text:span><text:span text:style-name="Source_20_Text"><text:span text:style-name="T5">sendFeedback(event)email_confirm</text:span></text:span></text:p>
      <text:p text:style-name="P5"><text:soft-page-break/>JavaScript</text:p>
      <text:p text:style-name="P6"><text:span text:style-name="Source_20_Text"><text:span text:style-name="T7"><text:s text:c="2"/></text:span></text:span><text:span text:style-name="Source_20_Text"><text:span text:style-name="T6">const formData = new FormData(form);</text:span></text:span></text:p>
      <text:p text:style-name="P6"><text:span text:style-name="Source_20_Text"><text:span text:style-name="T7"><text:s text:c="2"/></text:span></text:span><text:span text:style-name="Source_20_Text"><text:span text:style-name="T6">const payload = {</text:span></text:span></text:p>
      <text:p text:style-name="P6"><text:span text:style-name="Source_20_Text"><text:span text:style-name="T7"><text:s text:c="4"/></text:span></text:span><text:span text:style-name="Source_20_Text"><text:span text:style-name="T6">action: "feedback",</text:span></text:span></text:p>
      <text:p text:style-name="P6"><text:span text:style-name="Source_20_Text"><text:span text:style-name="T7"><text:s text:c="4"/></text:span></text:span><text:span text:style-name="Source_20_Text"><text:span text:style-name="T6">type: formData.get('type'),</text:span></text:span></text:p>
      <text:p text:style-name="P6"><text:span text:style-name="Source_20_Text"><text:span text:style-name="T7"><text:s text:c="4"/></text:span></text:span><text:span text:style-name="Source_20_Text"><text:span text:style-name="T6">name: formData.get('name'),</text:span></text:span></text:p>
      <text:p text:style-name="P6"><text:span text:style-name="Source_20_Text"><text:span text:style-name="T7"><text:s text:c="4"/></text:span></text:span><text:span text:style-name="Source_20_Text"><text:span text:style-name="T6">contact: formData.get('contact'),</text:span></text:span></text:p>
      <text:p text:style-name="P6"><text:span text:style-name="Source_20_Text"><text:span text:style-name="T7"><text:s text:c="4"/></text:span></text:span><text:span text:style-name="Source_20_Text"><text:span text:style-name="T6">orderNumber: formData.get('order_number') || 'Не указан',</text:span></text:span></text:p>
      <text:p text:style-name="P6"><text:span text:style-name="Source_20_Text"><text:span text:style-name="T7"><text:s text:c="4"/></text:span></text:span><text:span text:style-name="Source_20_Text"><text:span text:style-name="T6">message: formData.get('message'),</text:span></text:span></text:p>
      <text:p text:style-name="P6"><text:span text:style-name="Source_20_Text"><text:span text:style-name="T7"><text:s text:c="4"/></text:span></text:span><text:span text:style-name="Source_20_Text"><text:span text:style-name="T6">// [НОВОЕ]: Передаем значение ловушки в воркер</text:span></text:span></text:p>
      <text:p text:style-name="P6"><text:span text:style-name="Source_20_Text"><text:span text:style-name="T7"><text:s text:c="4"/></text:span></text:span><text:span text:style-name="Source_20_Text"><text:span text:style-name="T6">honey: formData.get('email_confirm') </text:span></text:span></text:p>
      <text:p text:style-name="P7"><text:span text:style-name="Source_20_Text"><text:span text:style-name="T7"><text:s text:c="2"/></text:span></text:span><text:span text:style-name="Source_20_Text"><text:span text:style-name="T6">};</text:span></text:span></text:p>
      <text:p text:style-name="P8">Use code with caution.</text:p>
      <text:p text:style-name="P3"/>
      <text:p text:style-name="P5">Шаг 3. Включите проверку внутри Cloudflare Worker</text:p>
      <text:p text:style-name="P4"><text:span text:style-name="T1">Теперь на стороне воркера мы проверяем, пустое ли это поле. Если в есть хоть один символ — мы делаем вид, что всё успешно отправилось (чтобы бот не пытался обойти защиту), но </text:span><text:span text:style-name="Source_20_Text"><text:span text:style-name="T5">clientData.honey</text:span></text:span><text:span text:style-name="Strong_20_Emphasis"><text:span text:style-name="T2">не отправляем</text:span></text:span><text:span text:style-name="T1"> уведомление в Telegram.</text:span></text:p>
      <text:p text:style-name="P14">Обновите блок обработки формы в вашем воркере:</text:p>
      <text:p text:style-name="P5">JavaScript</text:p>
      <text:p text:style-name="P6"><text:span text:style-name="Source_20_Text"><text:span text:style-name="T7"><text:s text:c="6"/></text:span></text:span><text:span text:style-name="Source_20_Text"><text:span text:style-name="T6">// Если пришла форма обратной связи</text:span></text:span></text:p>
      <text:p text:style-name="P6"><text:span text:style-name="Source_20_Text"><text:span text:style-name="T7"><text:s text:c="6"/></text:span></text:span><text:span text:style-name="Source_20_Text"><text:span text:style-name="T6">if (clientData.action === "feedback") {</text:span></text:span></text:p>
      <text:p text:style-name="P7"><text:span text:style-name="Source_20_Text"><text:span text:style-name="T7"><text:s text:c="8"/></text:span></text:span></text:p>
      <text:p text:style-name="P6"><text:span text:style-name="Source_20_Text"><text:span text:style-name="T7"><text:s text:c="8"/></text:span></text:span><text:span text:style-name="Source_20_Text"><text:span text:style-name="T6">// [НОВОЕ]: Защита Honeypot. Если поле заполнено — это бот!</text:span></text:span></text:p>
      <text:p text:style-name="P6"><text:span text:style-name="Source_20_Text"><text:span text:style-name="T7"><text:s text:c="8"/></text:span></text:span><text:span text:style-name="Source_20_Text"><text:span text:style-name="T6">if (clientData.honey &amp;&amp; clientData.honey.trim().length &gt; 0) {</text:span></text:span></text:p>
      <text:p text:style-name="P6"><text:span text:style-name="Source_20_Text"><text:span text:style-name="T7"><text:s text:c="10"/></text:span></text:span><text:span text:style-name="Source_20_Text"><text:span text:style-name="T6">console.log("🤖 Заблокирован спам-бот!");</text:span></text:span></text:p>
      <text:p text:style-name="P6"><text:span text:style-name="Source_20_Text"><text:span text:style-name="T7"><text:s text:c="10"/></text:span></text:span><text:span text:style-name="Source_20_Text"><text:span text:style-name="T6">// Возвращаем боту статус "успешно", чтобы он успокоился, но в ТГ ничего не шлем</text:span></text:span></text:p>
      <text:p text:style-name="P6"><text:span text:style-name="Source_20_Text"><text:span text:style-name="T7"><text:s text:c="10"/></text:span></text:span><text:span text:style-name="Source_20_Text"><text:span text:style-name="T6">return new Response(JSON.stringify({ status: "success", message: "Processed" }), {</text:span></text:span></text:p>
      <text:p text:style-name="P6"><text:span text:style-name="Source_20_Text"><text:span text:style-name="T7"><text:s text:c="12"/></text:span></text:span><text:span text:style-name="Source_20_Text"><text:span text:style-name="T6">status: 200,</text:span></text:span></text:p>
      <text:p text:style-name="P6"><text:span text:style-name="Source_20_Text"><text:span text:style-name="T7"><text:s text:c="12"/></text:span></text:span><text:span text:style-name="Source_20_Text"><text:span text:style-name="T6">headers: corsHeaders</text:span></text:span></text:p>
      <text:p text:style-name="P7"><text:span text:style-name="Source_20_Text"><text:span text:style-name="T7"><text:s text:c="10"/></text:span></text:span><text:span text:style-name="Source_20_Text"><text:span text:style-name="T6">});</text:span></text:span></text:p>
      <text:p text:style-name="P7"><text:span text:style-name="Source_20_Text"><text:span text:style-name="T7"><text:s text:c="8"/></text:span></text:span><text:span text:style-name="Source_20_Text"><text:span text:style-name="T6">}</text:span></text:span></text:p>
      <text:p text:style-name="P7"/>
      <text:p text:style-name="P6"><text:span text:style-name="Source_20_Text"><text:span text:style-name="T7"><text:s text:c="8"/></text:span></text:span><text:span text:style-name="Source_20_Text"><text:span text:style-name="T6">// --- ДАЛЬШЕ ИДЕТ ВАШ СТАРЫЙ КОД ОТПРАВКИ В TELEGRAM ---</text:span></text:span></text:p>
      <text:p text:style-name="P6"><text:span text:style-name="Source_20_Text"><text:span text:style-name="T7"><text:s text:c="8"/></text:span></text:span><text:span text:style-name="Source_20_Text"><text:span text:style-name="T6">const TG_TOKEN = "7123456789:ABC...";</text:span></text:span></text:p>
      <text:p text:style-name="P8">Use code with caution.</text:p>
      <text:p text:style-name="P4"><text:span text:style-name="T3">Дополнительная микро-защита по времени (в </text:span><text:span text:style-name="Source_20_Text"><text:span text:style-name="T4">assets/app.js</text:span></text:span><text:span text:style-name="T3">)</text:span></text:p>
      <text:p text:style-name="P14">Боты заполняют и отправляют форму за доли секунды после открытия страницы. Человеку нужно минимум 4–5 секунд, чтобы ввести имя и контакты.</text:p>
      <text:p text:style-name="P4"><text:span text:style-name="T1">Вы можете добавить простую проверку времени внутри .</text:span><text:span text:style-name="Source_20_Text"><text:span text:style-name="T5">assets/app.js</text:span></text:span></text:p>
      <text:list text:style-name="L4">
        <text:list-item>
          <text:p text:style-name="P25"><text:span text:style-name="T1">В начало функции добавьте: </text:span><text:span text:style-name="Source_20_Text"><text:span text:style-name="T5">openFeedbackModalwindow.modalOpenTime = Date.now();</text:span></text:span></text:p>
        </text:list-item>
        <text:list-item>
          <text:p text:style-name="P25"><text:span text:style-name="T1">В начало функции добавьте:</text:span><text:span text:style-name="Source_20_Text"><text:span text:style-name="T5">sendFeedback</text:span></text:span></text:p>
          <text:p text:style-name="P26">JavaScript</text:p>
          <text:p text:style-name="P27"><text:span text:style-name="Source_20_Text"><text:span text:style-name="T6">// Если форма отправлена быстрее чем за 3 секунды — это бот</text:span></text:span></text:p>
          <text:p text:style-name="P27"><text:span text:style-name="Source_20_Text"><text:span text:style-name="T6">if (Date.now() - window.modalOpenTime &lt; 3000) {</text:span></text:span></text:p>
          <text:p text:style-name="P27"><text:span text:style-name="Source_20_Text"><text:span text:style-name="T7"><text:s text:c="2"/></text:span></text:span><text:span text:style-name="Source_20_Text"><text:span text:style-name="T6">console.log("Слишком быстрая отправка");</text:span></text:span></text:p>
          <text:p text:style-name="P28"><text:span text:style-name="Source_20_Text"><text:span text:style-name="T7"><text:s text:c="2"/></text:span></text:span><text:span text:style-name="Source_20_Text"><text:span text:style-name="T6">closeFeedbackModal();</text:span></text:span></text:p>
          <text:p text:style-name="P27"><text:span text:style-name="Source_20_Text"><text:span text:style-name="T7"><text:s text:c="2"/></text:span></text:span><text:span text:style-name="Source_20_Text"><text:span text:style-name="T6">return;</text:span></text:span></text:p>
          <text:p text:style-name="P28"><text:span text:style-name="Source_20_Text"><text:span text:style-name="T6">}</text:span></text:span></text:p>
          <text:p text:style-name="P29">Use code with caution.</text:p>
        </text:list-item>
      </text:list>
      <text:p text:style-name="P4"><text:soft-page-break/><text:span text:style-name="T1">Эта связка из и полностью закроет ваш Telegram-канал от спама без необходимости мучить покупателей вводом капчи.</text:span><text:span text:style-name="Strong_20_Emphasis"><text:span text:style-name="T2">невидимого поляпроверки скорости заполнения</text:span></text:span></text:p>
      <text:p text:style-name="P4"><text:span text:style-name="T1">Внесите эти правки на сайт. Чтобы проверить защиту самостоятельно, вы можете временно убрать у ловушки в HTML, ввести туда любой символ и нажать кнопку отправки. </text:span><text:span text:style-name="Source_20_Text"><text:span text:style-name="T5">display: none</text:span></text:span><text:span text:style-name="Strong_20_Emphasis"><text:span text:style-name="T2">Пришло ли уведомление в Telegram при заполненном поле-ловушке?</text:span></text:span><text:span text:style-name="T1"> (Должно сработать молчаливое игнорирование).</text:span></text:p>
      <text:section text:style-name="Sect1" text:name="shrproxy221">
        <text:p text:style-name="P4"/>
      </text:section>
      <text:section text:style-name="Sect1" text:name="fbproxy222">
        <text:p text:style-name="P4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7T21:09:18.925091400</meta:creation-date>
    <dc:date>2026-07-11T18:44:28.885571900</dc:date>
    <meta:editing-duration>P3DT10H26M52S</meta:editing-duration>
    <meta:editing-cycles>4</meta:editing-cycles>
    <meta:generator>LibreOffice/26.2.4.2$Windows_X86_64 LibreOffice_project/0229ac93fcf0d7cbc6376066c6f35021cef002dc</meta:generator>
    <meta:document-statistic meta:table-count="0" meta:image-count="0" meta:object-count="0" meta:page-count="9" meta:paragraph-count="285" meta:word-count="2028" meta:character-count="17388" meta:non-whitespace-character-count="14619"/>
  </office:meta>
</office:document-meta>
</file>